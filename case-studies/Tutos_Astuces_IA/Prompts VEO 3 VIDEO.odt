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</office:automatic-styles>
  <office:body>
    <office:text text:use-soft-page-breaks="true">
      <text:p text:style-name="P1">Prompts VEO 3.1</text:p>
      <text:p text:style-name="P2"/>
      <text:p text:style-name="P3">Démo 1<text:s/>-<text:s/>Publicité produit</text:p>
      <text:p text:style-name="P4">Plan cinématique en gros plan, format 16:9. Une bouteille de parfum en verre</text:p>
      <text:p text:style-name="P5">ambré posée sur un socle de marbre noir, éclairée par une lumière dorée</text:p>
      <text:p text:style-name="P6">chaude venant de la gauche, façon golden hour. La caméra effectue un</text:p>
      <text:p text:style-name="P7">lent travelling circulaire de 180° autour du produit. Des particules de</text:p>
      <text:p text:style-name="P8">poussière dorée flottent dans les rayons de lumière. Arrière-plan flou,</text:p>
      <text:p text:style-name="P9">dégradé noir profond. Rendu photoréaliste, style publicité de luxe haut</text:p>
      <text:p text:style-name="P10">de gamme, sans texte ni logo visible.</text:p>
      <text:p text:style-name="P11"/>
      <text:p text:style-name="P12">Démo 2<text:s/>-<text:s/>Paysage / plan d'ambiance</text:p>
      <text:p text:style-name="P13"/>
      <text:p text:style-name="P14">Plan large, format 16:9. Vue aérienne d'une côte bretonne au lever du</text:p>
      <text:p text:style-name="P15">soleil, falaises rocheuses battues par des vagues, brume légère au ras</text:p>
      <text:p text:style-name="P16">de l'eau. La caméra avance lentement en drone vers l'horizon. Lumière</text:p>
      <text:p text:style-name="P17">naturelle douce et bleutée du petit matin, teintes désaturées. Mouettes</text:p>
      <text:p text:style-name="P18">en vol au loin. Ambiance calme et cinématographique, qualité 4K,</text:p>
      <text:p text:style-name="P19">esthétique documentaire nature.</text:p>
      <text:p text:style-name="P20"/>
      <text:p text:style-name="P21">Démo 3<text:s/>-<text:s/>Portrait / personnage</text:p>
      <text:p text:style-name="P22"/>
      <text:p text:style-name="P23">Plan rapproché poitrine, format 9:16 vertical. Une femme d'une trentaine</text:p>
      <text:p text:style-name="P24">d'années, cheveux courts châtains, pull en laine vert forêt, assise près</text:p>
      <text:p text:style-name="P25">d'une fenêtre par un après-midi pluvieux. Elle tient une tasse en</text:p>
      <text:p text:style-name="P26">céramique entre les mains et regarde pensivement vers l'extérieur.</text:p>
      <text:p text:style-name="P27">Lumière naturelle diffuse, tons chauds et intimes, faible profondeur de</text:p>
      <text:p text:style-name="P28">champ. Légère animation : respiration naturelle, cligne des yeux,</text:p>
      <text:p text:style-name="P29">mouvement discret des cheveux. Style cinéma indépendant.</text:p>
      <text:p text:style-name="P30"/>
      <text:p text:style-name="P3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ylvie NITIEMA</meta:initial-creator>
    <dc:creator>Sylvie NITIEMA</dc:creator>
    <meta:creation-date>2026-07-06T23:01:00Z</meta:creation-date>
    <dc:date>2026-07-07T20:24:00Z</dc:date>
    <meta:template xlink:href="Normal" xlink:type="simple"/>
    <meta:editing-cycles>6</meta:editing-cycles>
    <meta:editing-duration>PT780S</meta:editing-duration>
    <meta:document-statistic meta:page-count="1" meta:paragraph-count="2" meta:word-count="222" meta:character-count="1441" meta:row-count="10" meta:non-whitespace-character-count="1221"/>
  </office:meta>
</office:document-meta>
</file>