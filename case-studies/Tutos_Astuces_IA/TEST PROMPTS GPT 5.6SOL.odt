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2" style:family="paragraph"/>
    <style:style style:name="P11" style:parent-style-name="Normal" style:list-style-name="LFO2" style:family="paragraph"/>
    <style:style style:name="P12" style:parent-style-name="Normal" style:list-style-name="LFO2" style:family="paragraph"/>
    <style:style style:name="P13" style:parent-style-name="Normal" style:family="paragraph">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P17" style:parent-style-name="Normal" style:list-style-name="LFO3" style:family="paragraph"/>
    <style:style style:name="P18" style:parent-style-name="Normal" style:list-style-name="LFO3" style:family="paragraph"/>
    <style:style style:name="P19" style:parent-style-name="Normal" style:list-style-name="LFO3" style:family="paragraph"/>
    <style:style style:name="T20" style:parent-style-name="Policepardéfaut" style:family="text">
      <style:text-properties fo:font-weight="bold" style:font-weight-asian="bold" style:font-weight-complex="bold"/>
    </style:style>
    <style:style style:name="P21" style:parent-style-name="Normal" style:list-style-name="LFO4" style:family="paragraph"/>
    <style:style style:name="P22" style:parent-style-name="Normal" style:list-style-name="LFO4" style:family="paragraph"/>
    <style:style style:name="P23" style:parent-style-name="Normal" style:list-style-name="LFO4" style:family="paragraph"/>
    <style:style style:name="P24" style:parent-style-name="Normal" style:family="paragraph">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T26" style:parent-style-name="Policepardéfaut" style:family="text">
      <style:text-properties fo:font-weight="bold" style:font-weight-asian="bold" style:font-weight-complex="bold"/>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P30" style:parent-style-name="Normal" style:list-style-name="LFO5" style:family="paragraph"/>
    <style:style style:name="P31" style:parent-style-name="Normal" style:list-style-name="LFO5" style:family="paragraph"/>
    <style:style style:name="P32" style:parent-style-name="Normal" style:list-style-name="LFO5" style:family="paragraph"/>
    <style:style style:name="T33" style:parent-style-name="Policepardéfaut" style:family="text">
      <style:text-properties fo:font-weight="bold" style:font-weight-asian="bold" style:font-weight-complex="bold"/>
    </style:style>
    <style:style style:name="P34" style:parent-style-name="Normal" style:list-style-name="LFO6" style:family="paragraph"/>
    <style:style style:name="P35" style:parent-style-name="Normal" style:list-style-name="LFO6" style:family="paragraph"/>
    <style:style style:name="P36" style:parent-style-name="Normal" style:list-style-name="LFO6" style:family="paragraph"/>
    <style:style style:name="P37" style:parent-style-name="Normal" style:family="paragraph">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P41" style:parent-style-name="Normal" style:list-style-name="LFO7" style:family="paragraph"/>
    <style:style style:name="P42" style:parent-style-name="Normal" style:list-style-name="LFO7" style:family="paragraph"/>
    <style:style style:name="P43" style:parent-style-name="Normal" style:list-style-name="LFO7" style:family="paragraph"/>
    <style:style style:name="T44" style:parent-style-name="Policepardéfaut" style:family="text">
      <style:text-properties fo:font-weight="bold" style:font-weight-asian="bold" style:font-weight-complex="bold"/>
    </style:style>
    <style:style style:name="P45" style:parent-style-name="Normal" style:list-style-name="LFO8" style:family="paragraph"/>
    <style:style style:name="P46" style:parent-style-name="Normal" style:list-style-name="LFO8" style:family="paragraph"/>
    <style:style style:name="P47" style:parent-style-name="Normal" style:list-style-name="LFO8" style:family="paragraph"/>
    <style:style style:name="TableColumn49" style:family="table-column">
      <style:table-column-properties style:column-width="0.7013in"/>
    </style:style>
    <style:style style:name="TableColumn50" style:family="table-column">
      <style:table-column-properties style:column-width="1.8305in"/>
    </style:style>
    <style:style style:name="TableColumn51" style:family="table-column">
      <style:table-column-properties style:column-width="1.0145in"/>
    </style:style>
    <style:style style:name="TableColumn52" style:family="table-column">
      <style:table-column-properties style:column-width="1.3743in"/>
    </style:style>
    <style:style style:name="TableColumn53" style:family="table-column">
      <style:table-column-properties style:column-width="1.3791in"/>
    </style:style>
    <style:style style:name="Table48" style:family="table">
      <style:table-properties style:width="6.3in" fo:margin-left="0in" table:align="left"/>
    </style:style>
    <style:style style:name="TableRow54" style:family="table-row">
      <style:table-row-properties/>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text-properties fo:font-weight="bold" style:font-weight-asian="bold" style:font-weight-complex="bold"/>
    </style:style>
    <style:style style:name="TableCell57" style:family="table-cell">
      <style:table-cell-properties fo:border="none" style:writing-mode="lr-tb" style:vertical-align="middle" fo:padding-top="0.0104in" fo:padding-left="0.0104in" fo:padding-bottom="0.0104in" fo:padding-right="0.0104in"/>
    </style:style>
    <style:style style:name="P58" style:parent-style-name="Normal" style:family="paragraph">
      <style:text-properties fo:font-weight="bold" style:font-weight-asian="bold" style:font-weight-complex="bold"/>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Normal" style:family="paragraph">
      <style:text-properties fo:font-weight="bold" style:font-weight-asian="bold" style:font-weight-complex="bold"/>
    </style:style>
    <style:style style:name="TableCell61" style:family="table-cell">
      <style:table-cell-properties fo:border="none" style:writing-mode="lr-tb" style:vertical-align="middle" fo:padding-top="0.0104in" fo:padding-left="0.0104in" fo:padding-bottom="0.0104in" fo:padding-right="0.0104in"/>
    </style:style>
    <style:style style:name="P62" style:parent-style-name="Normal" style:family="paragraph">
      <style:text-properties fo:font-weight="bold" style:font-weight-asian="bold" style:font-weight-complex="bold"/>
    </style:style>
    <style:style style:name="TableCell63" style:family="table-cell">
      <style:table-cell-properties fo:border="none" style:writing-mode="lr-tb" style:vertical-align="middle" fo:padding-top="0.0104in" fo:padding-left="0.0104in" fo:padding-bottom="0.0104in" fo:padding-right="0.0104in"/>
    </style:style>
    <style:style style:name="P64" style:parent-style-name="Normal" style:family="paragraph">
      <style:text-properties fo:font-weight="bold" style:font-weight-asian="bold" style:font-weight-complex="bold"/>
    </style:style>
    <style:style style:name="TableRow65" style:family="table-row">
      <style:table-row-properties/>
    </style:style>
    <style:style style:name="TableCell66" style:family="table-cell">
      <style:table-cell-properties fo:border="none" style:writing-mode="lr-tb" style:vertical-align="middle" fo:padding-top="0.0104in" fo:padding-left="0.0104in" fo:padding-bottom="0.0104in" fo:padding-right="0.0104in"/>
    </style:style>
    <style:style style:name="TableCell67" style:family="table-cell">
      <style:table-cell-properties fo:border="none" style:writing-mode="lr-tb" style:vertical-align="middle" fo:padding-top="0.0104in" fo:padding-left="0.0104in" fo:padding-bottom="0.0104in" fo:padding-right="0.0104in"/>
    </style:style>
    <style:style style:name="TableCell68" style:family="table-cell">
      <style:table-cell-properties fo:border="none" style:writing-mode="lr-tb" style:vertical-align="middle" fo:padding-top="0.0104in" fo:padding-left="0.0104in" fo:padding-bottom="0.0104in" fo:padding-right="0.0104in"/>
    </style:style>
    <style:style style:name="TableCell69" style:family="table-cell">
      <style:table-cell-properties fo:border="none" style:writing-mode="lr-tb" style:vertical-align="middle" fo:padding-top="0.0104in" fo:padding-left="0.0104in" fo:padding-bottom="0.0104in" fo:padding-right="0.0104in"/>
    </style:style>
    <style:style style:name="TableCell70" style:family="table-cell">
      <style:table-cell-properties fo:border="none" style:writing-mode="lr-tb" style:vertical-align="middle" fo:padding-top="0.0104in" fo:padding-left="0.0104in" fo:padding-bottom="0.0104in" fo:padding-right="0.0104in"/>
    </style:style>
    <style:style style:name="TableRow71" style:family="table-row">
      <style:table-row-properties/>
    </style:style>
    <style:style style:name="TableCell72" style:family="table-cell">
      <style:table-cell-properties fo:border="none" style:writing-mode="lr-tb" style:vertical-align="middle" fo:padding-top="0.0104in" fo:padding-left="0.0104in" fo:padding-bottom="0.0104in" fo:padding-right="0.0104in"/>
    </style:style>
    <style:style style:name="TableCell73" style:family="table-cell">
      <style:table-cell-properties fo:border="none" style:writing-mode="lr-tb" style:vertical-align="middle" fo:padding-top="0.0104in" fo:padding-left="0.0104in" fo:padding-bottom="0.0104in" fo:padding-right="0.0104in"/>
    </style:style>
    <style:style style:name="TableCell74" style:family="table-cell">
      <style:table-cell-properties fo:border="none" style:writing-mode="lr-tb" style:vertical-align="middle" fo:padding-top="0.0104in" fo:padding-left="0.0104in" fo:padding-bottom="0.0104in" fo:padding-right="0.0104in"/>
    </style:style>
    <style:style style:name="TableCell75" style:family="table-cell">
      <style:table-cell-properties fo:border="none" style:writing-mode="lr-tb" style:vertical-align="middle" fo:padding-top="0.0104in" fo:padding-left="0.0104in" fo:padding-bottom="0.0104in" fo:padding-right="0.0104in"/>
    </style:style>
    <style:style style:name="TableCell76" style:family="table-cell">
      <style:table-cell-properties fo:border="none" style:writing-mode="lr-tb" style:vertical-align="middle" fo:padding-top="0.0104in" fo:padding-left="0.0104in" fo:padding-bottom="0.0104in" fo:padding-right="0.0104in"/>
    </style:style>
    <style:style style:name="TableRow77" style:family="table-row">
      <style:table-row-properties/>
    </style:style>
    <style:style style:name="TableCell78" style:family="table-cell">
      <style:table-cell-properties fo:border="none" style:writing-mode="lr-tb" style:vertical-align="middle" fo:padding-top="0.0104in" fo:padding-left="0.0104in" fo:padding-bottom="0.0104in" fo:padding-right="0.0104in"/>
    </style:style>
    <style:style style:name="TableCell79" style:family="table-cell">
      <style:table-cell-properties fo:border="none" style:writing-mode="lr-tb" style:vertical-align="middle" fo:padding-top="0.0104in" fo:padding-left="0.0104in" fo:padding-bottom="0.0104in" fo:padding-right="0.0104in"/>
    </style:style>
    <style:style style:name="TableCell80" style:family="table-cell">
      <style:table-cell-properties fo:border="none" style:writing-mode="lr-tb" style:vertical-align="middle" fo:padding-top="0.0104in" fo:padding-left="0.0104in" fo:padding-bottom="0.0104in" fo:padding-right="0.0104in"/>
    </style:style>
    <style:style style:name="TableCell81" style:family="table-cell">
      <style:table-cell-properties fo:border="none" style:writing-mode="lr-tb" style:vertical-align="middle" fo:padding-top="0.0104in" fo:padding-left="0.0104in" fo:padding-bottom="0.0104in" fo:padding-right="0.0104in"/>
    </style:style>
    <style:style style:name="TableCell82" style:family="table-cell">
      <style:table-cell-properties fo:border="none" style:writing-mode="lr-tb" style:vertical-align="middle" fo:padding-top="0.0104in" fo:padding-left="0.0104in" fo:padding-bottom="0.0104in" fo:padding-right="0.0104in"/>
    </style:style>
    <style:style style:name="TableRow83" style:family="table-row">
      <style:table-row-properties/>
    </style:style>
    <style:style style:name="TableCell84" style:family="table-cell">
      <style:table-cell-properties fo:border="none" style:writing-mode="lr-tb" style:vertical-align="middle" fo:padding-top="0.0104in" fo:padding-left="0.0104in" fo:padding-bottom="0.0104in" fo:padding-right="0.0104in"/>
    </style:style>
    <style:style style:name="TableCell85" style:family="table-cell">
      <style:table-cell-properties fo:border="none" style:writing-mode="lr-tb" style:vertical-align="middle" fo:padding-top="0.0104in" fo:padding-left="0.0104in" fo:padding-bottom="0.0104in" fo:padding-right="0.0104in"/>
    </style:style>
    <style:style style:name="TableCell86" style:family="table-cell">
      <style:table-cell-properties fo:border="none" style:writing-mode="lr-tb" style:vertical-align="middle" fo:padding-top="0.0104in" fo:padding-left="0.0104in" fo:padding-bottom="0.0104in" fo:padding-right="0.0104in"/>
    </style:style>
    <style:style style:name="TableCell87" style:family="table-cell">
      <style:table-cell-properties fo:border="none" style:writing-mode="lr-tb" style:vertical-align="middle" fo:padding-top="0.0104in" fo:padding-left="0.0104in" fo:padding-bottom="0.0104in" fo:padding-right="0.0104in"/>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P91" style:parent-style-name="Normal" style:list-style-name="LFO9" style:family="paragraph"/>
    <style:style style:name="P92" style:parent-style-name="Normal" style:list-style-name="LFO9" style:family="paragraph"/>
    <style:style style:name="P93" style:parent-style-name="Normal" style:list-style-name="LFO9" style:family="paragraph"/>
    <style:style style:name="T94" style:parent-style-name="Policepardéfaut" style:family="text">
      <style:text-properties fo:font-weight="bold" style:font-weight-asian="bold" style:font-weight-complex="bold"/>
    </style:style>
    <style:style style:name="P95" style:parent-style-name="Normal" style:list-style-name="LFO9" style:family="paragraph"/>
    <style:style style:name="P96" style:parent-style-name="Normal" style:list-style-name="LFO9" style:family="paragraph"/>
    <style:style style:name="T97" style:parent-style-name="Policepardéfaut" style:family="text">
      <style:text-properties fo:font-weight="bold" style:font-weight-asian="bold" style:font-weight-complex="bold"/>
    </style:style>
    <style:style style:name="P9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9" style:parent-style-name="Normal" style:family="paragraph">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P102" style:parent-style-name="Normal" style:list-style-name="LFO10" style:family="paragraph"/>
    <style:style style:name="P103" style:parent-style-name="Normal" style:list-style-name="LFO10" style:family="paragraph"/>
    <style:style style:name="P104" style:parent-style-name="Normal" style:list-style-name="LFO10" style:family="paragraph"/>
    <style:style style:name="T105" style:parent-style-name="Policepardéfaut" style:family="text">
      <style:text-properties fo:font-weight="bold" style:font-weight-asian="bold" style:font-weight-complex="bold"/>
    </style:style>
    <style:style style:name="P106" style:parent-style-name="Normal" style:list-style-name="LFO11" style:family="paragraph"/>
    <style:style style:name="P107" style:parent-style-name="Normal" style:list-style-name="LFO11" style:family="paragraph"/>
    <style:style style:name="P108" style:parent-style-name="Normal" style:list-style-name="LFO11" style:family="paragraph"/>
    <style:style style:name="T109" style:parent-style-name="Policepardéfaut" style:family="text">
      <style:text-properties fo:font-weight="bold" style:font-weight-asian="bold" style:font-weight-complex="bold"/>
    </style:style>
    <style:style style:name="P110" style:parent-style-name="Normal" style:list-style-name="LFO12" style:family="paragraph"/>
    <style:style style:name="P111" style:parent-style-name="Normal" style:list-style-name="LFO12" style:family="paragraph"/>
    <style:style style:name="P112" style:parent-style-name="Normal" style:list-style-name="LFO12" style:family="paragraph"/>
    <style:style style:name="P113" style:parent-style-name="Normal" style:family="paragraph">
      <style:text-properties fo:font-weight="bold" style:font-weight-asian="bold" style:font-weight-complex="bold"/>
    </style:style>
    <style:style style:name="P114" style:parent-style-name="Normal" style:family="paragraph">
      <style:text-properties fo:font-weight="bold" style:font-weight-asian="bold" style:font-weight-complex="bold"/>
    </style:style>
    <style:style style:name="P115" style:parent-style-name="Normal" style:family="paragraph">
      <style:text-properties fo:font-weight="bold" style:font-weight-asian="bold" style:font-weight-complex="bold"/>
    </style:style>
    <style:style style:name="T116" style:parent-style-name="Policepardéfaut" style:family="text">
      <style:text-properties fo:font-weight="bold" style:font-weight-asian="bold" style:font-weight-complex="bold"/>
    </style:style>
    <style:style style:name="T117" style:parent-style-name="Policepardéfaut" style:family="text">
      <style:text-properties fo:font-weight="bold" style:font-weight-asian="bold" style:font-weight-complex="bold"/>
    </style:style>
    <style:style style:name="P118" style:parent-style-name="Normal" style:list-style-name="LFO13" style:family="paragraph"/>
    <style:style style:name="P119" style:parent-style-name="Normal" style:list-style-name="LFO13" style:family="paragraph"/>
    <style:style style:name="P120" style:parent-style-name="Normal" style:list-style-name="LFO13" style:family="paragraph"/>
    <style:style style:name="T121" style:parent-style-name="Policepardéfaut" style:family="text">
      <style:text-properties fo:font-weight="bold" style:font-weight-asian="bold" style:font-weight-complex="bold"/>
    </style:style>
    <style:style style:name="P122" style:parent-style-name="Normal" style:list-style-name="LFO14" style:family="paragraph"/>
    <style:style style:name="P123" style:parent-style-name="Normal" style:list-style-name="LFO14" style:family="paragraph"/>
    <style:style style:name="P124" style:parent-style-name="Normal" style:list-style-name="LFO14" style:family="paragraph"/>
    <style:style style:name="T125" style:parent-style-name="Policepardéfaut" style:family="text">
      <style:text-properties fo:font-weight="bold" style:font-weight-asian="bold" style:font-weight-complex="bold"/>
    </style:style>
    <style:style style:name="P126" style:parent-style-name="Normal" style:list-style-name="LFO15" style:family="paragraph"/>
    <style:style style:name="P127" style:parent-style-name="Normal" style:list-style-name="LFO15" style:family="paragraph"/>
    <style:style style:name="P128" style:parent-style-name="Normal" style:list-style-name="LFO15" style:family="paragraph"/>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list-style-name="LFO16" style:family="paragraph"/>
    <style:style style:name="P133" style:parent-style-name="Normal" style:list-style-name="LFO16" style:family="paragraph"/>
    <style:style style:name="T134" style:parent-style-name="Policepardéfaut" style:family="text">
      <style:text-properties fo:font-weight="bold" style:font-weight-asian="bold" style:font-weight-complex="bold"/>
    </style:style>
    <style:style style:name="P135" style:parent-style-name="Normal" style:list-style-name="LFO17" style:family="paragraph"/>
    <style:style style:name="P136" style:parent-style-name="Normal" style:list-style-name="LFO17" style:family="paragraph"/>
    <style:style style:name="P137" style:parent-style-name="Normal" style:list-style-name="LFO17" style:family="paragraph"/>
    <style:style style:name="T138" style:parent-style-name="Policepardéfaut" style:family="text">
      <style:text-properties fo:font-weight="bold" style:font-weight-asian="bold" style:font-weight-complex="bold"/>
    </style:style>
    <style:style style:name="P139" style:parent-style-name="Normal" style:list-style-name="LFO18" style:family="paragraph"/>
    <style:style style:name="P140" style:parent-style-name="Normal" style:list-style-name="LFO18" style:family="paragraph"/>
    <style:style style:name="P141" style:parent-style-name="Normal" style:list-style-name="LFO18" style:family="paragraph"/>
    <style:style style:name="P142" style:parent-style-name="Normal" style:family="paragraph">
      <style:text-properties fo:font-weight="bold" style:font-weight-asian="bold" style:font-weight-complex="bold"/>
    </style:style>
    <style:style style:name="T143" style:parent-style-name="Policepardéfaut" style:family="text">
      <style:text-properties fo:font-weight="bold" style:font-weight-asian="bold" style:font-weight-complex="bold"/>
    </style:style>
    <style:style style:name="T144" style:parent-style-name="Policepardéfaut" style:family="text">
      <style:text-properties fo:font-weight="bold" style:font-weight-asian="bold" style:font-weight-complex="bold"/>
    </style:style>
    <style:style style:name="P145" style:parent-style-name="Normal" style:list-style-name="LFO19" style:family="paragraph"/>
    <style:style style:name="P146" style:parent-style-name="Normal" style:list-style-name="LFO19" style:family="paragraph"/>
    <style:style style:name="T147" style:parent-style-name="Policepardéfaut" style:family="text">
      <style:text-properties fo:font-weight="bold" style:font-weight-asian="bold" style:font-weight-complex="bold"/>
    </style:style>
    <style:style style:name="P148" style:parent-style-name="Normal" style:list-style-name="LFO20" style:family="paragraph"/>
    <style:style style:name="P149" style:parent-style-name="Normal" style:list-style-name="LFO20" style:family="paragraph"/>
    <style:style style:name="P150" style:parent-style-name="Normal" style:list-style-name="LFO20" style:family="paragraph"/>
    <style:style style:name="T151" style:parent-style-name="Policepardéfaut" style:family="text">
      <style:text-properties fo:font-weight="bold" style:font-weight-asian="bold" style:font-weight-complex="bold"/>
    </style:style>
    <style:style style:name="P152" style:parent-style-name="Normal" style:list-style-name="LFO21" style:family="paragraph"/>
    <style:style style:name="P153" style:parent-style-name="Normal" style:list-style-name="LFO21" style:family="paragraph"/>
    <style:style style:name="P154" style:parent-style-name="Normal" style:list-style-name="LFO21" style:family="paragraph"/>
    <style:style style:name="P155" style:parent-style-name="Normal" style:family="paragraph">
      <style:text-properties fo:font-weight="bold" style:font-weight-asian="bold" style:font-weight-complex="bold"/>
    </style:style>
    <style:style style:name="TableColumn157" style:family="table-column">
      <style:table-column-properties style:column-width="0.7013in"/>
    </style:style>
    <style:style style:name="TableColumn158" style:family="table-column">
      <style:table-column-properties style:column-width="1.4826in"/>
    </style:style>
    <style:style style:name="TableColumn159" style:family="table-column">
      <style:table-column-properties style:column-width="1.268in"/>
    </style:style>
    <style:style style:name="TableColumn160" style:family="table-column">
      <style:table-column-properties style:column-width="1.4465in"/>
    </style:style>
    <style:style style:name="TableColumn161" style:family="table-column">
      <style:table-column-properties style:column-width="1.4013in"/>
    </style:style>
    <style:style style:name="Table156" style:family="table">
      <style:table-properties style:width="6.3in" fo:margin-left="0in" table:align="left"/>
    </style:style>
    <style:style style:name="TableRow162" style:family="table-row">
      <style:table-row-properties/>
    </style:style>
    <style:style style:name="TableCell163" style:family="table-cell">
      <style:table-cell-properties fo:border="none" style:writing-mode="lr-tb" style:vertical-align="middle" fo:padding-top="0.0104in" fo:padding-left="0.0104in" fo:padding-bottom="0.0104in" fo:padding-right="0.0104in"/>
    </style:style>
    <style:style style:name="P164" style:parent-style-name="Normal" style:family="paragraph">
      <style:text-properties fo:font-weight="bold" style:font-weight-asian="bold" style:font-weight-complex="bold"/>
    </style:style>
    <style:style style:name="TableCell165" style:family="table-cell">
      <style:table-cell-properties fo:border="none" style:writing-mode="lr-tb" style:vertical-align="middle" fo:padding-top="0.0104in" fo:padding-left="0.0104in" fo:padding-bottom="0.0104in" fo:padding-right="0.0104in"/>
    </style:style>
    <style:style style:name="P166" style:parent-style-name="Normal" style:family="paragraph">
      <style:text-properties fo:font-weight="bold" style:font-weight-asian="bold" style:font-weight-complex="bold"/>
    </style:style>
    <style:style style:name="TableCell167" style:family="table-cell">
      <style:table-cell-properties fo:border="none" style:writing-mode="lr-tb" style:vertical-align="middle" fo:padding-top="0.0104in" fo:padding-left="0.0104in" fo:padding-bottom="0.0104in" fo:padding-right="0.0104in"/>
    </style:style>
    <style:style style:name="P168" style:parent-style-name="Normal" style:family="paragraph">
      <style:text-properties fo:font-weight="bold" style:font-weight-asian="bold" style:font-weight-complex="bold"/>
    </style:style>
    <style:style style:name="TableCell169" style:family="table-cell">
      <style:table-cell-properties fo:border="none" style:writing-mode="lr-tb" style:vertical-align="middle" fo:padding-top="0.0104in" fo:padding-left="0.0104in" fo:padding-bottom="0.0104in" fo:padding-right="0.0104in"/>
    </style:style>
    <style:style style:name="P170" style:parent-style-name="Normal" style:family="paragraph">
      <style:text-properties fo:font-weight="bold" style:font-weight-asian="bold" style:font-weight-complex="bold"/>
    </style:style>
    <style:style style:name="TableCell171" style:family="table-cell">
      <style:table-cell-properties fo:border="none" style:writing-mode="lr-tb" style:vertical-align="middle" fo:padding-top="0.0104in" fo:padding-left="0.0104in" fo:padding-bottom="0.0104in" fo:padding-right="0.0104in"/>
    </style:style>
    <style:style style:name="P172" style:parent-style-name="Normal" style:family="paragraph">
      <style:text-properties fo:font-weight="bold" style:font-weight-asian="bold" style:font-weight-complex="bold"/>
    </style:style>
    <style:style style:name="TableRow173" style:family="table-row">
      <style:table-row-properties/>
    </style:style>
    <style:style style:name="TableCell174" style:family="table-cell">
      <style:table-cell-properties fo:border="none" style:writing-mode="lr-tb" style:vertical-align="middle" fo:padding-top="0.0104in" fo:padding-left="0.0104in" fo:padding-bottom="0.0104in" fo:padding-right="0.0104in"/>
    </style:style>
    <style:style style:name="TableCell175" style:family="table-cell">
      <style:table-cell-properties fo:border="none" style:writing-mode="lr-tb" style:vertical-align="middle" fo:padding-top="0.0104in" fo:padding-left="0.0104in" fo:padding-bottom="0.0104in" fo:padding-right="0.0104in"/>
    </style:style>
    <style:style style:name="TableCell176" style:family="table-cell">
      <style:table-cell-properties fo:border="none" style:writing-mode="lr-tb" style:vertical-align="middle" fo:padding-top="0.0104in" fo:padding-left="0.0104in" fo:padding-bottom="0.0104in" fo:padding-right="0.0104in"/>
    </style:style>
    <style:style style:name="TableCell177" style:family="table-cell">
      <style:table-cell-properties fo:border="none" style:writing-mode="lr-tb" style:vertical-align="middle" fo:padding-top="0.0104in" fo:padding-left="0.0104in" fo:padding-bottom="0.0104in" fo:padding-right="0.0104in"/>
    </style:style>
    <style:style style:name="TableCell178" style:family="table-cell">
      <style:table-cell-properties fo:border="none" style:writing-mode="lr-tb" style:vertical-align="middle" fo:padding-top="0.0104in" fo:padding-left="0.0104in" fo:padding-bottom="0.0104in" fo:padding-right="0.0104in"/>
    </style:style>
    <style:style style:name="TableRow179" style:family="table-row">
      <style:table-row-properties/>
    </style:style>
    <style:style style:name="TableCell180" style:family="table-cell">
      <style:table-cell-properties fo:border="none" style:writing-mode="lr-tb" style:vertical-align="middle" fo:padding-top="0.0104in" fo:padding-left="0.0104in" fo:padding-bottom="0.0104in" fo:padding-right="0.0104in"/>
    </style:style>
    <style:style style:name="TableCell181" style:family="table-cell">
      <style:table-cell-properties fo:border="none" style:writing-mode="lr-tb" style:vertical-align="middle" fo:padding-top="0.0104in" fo:padding-left="0.0104in" fo:padding-bottom="0.0104in" fo:padding-right="0.0104in"/>
    </style:style>
    <style:style style:name="TableCell182" style:family="table-cell">
      <style:table-cell-properties fo:border="none" style:writing-mode="lr-tb" style:vertical-align="middle" fo:padding-top="0.0104in" fo:padding-left="0.0104in" fo:padding-bottom="0.0104in" fo:padding-right="0.0104in"/>
    </style:style>
    <style:style style:name="TableCell183" style:family="table-cell">
      <style:table-cell-properties fo:border="none" style:writing-mode="lr-tb" style:vertical-align="middle" fo:padding-top="0.0104in" fo:padding-left="0.0104in" fo:padding-bottom="0.0104in" fo:padding-right="0.0104in"/>
    </style:style>
    <style:style style:name="TableCell184" style:family="table-cell">
      <style:table-cell-properties fo:border="none" style:writing-mode="lr-tb" style:vertical-align="middle" fo:padding-top="0.0104in" fo:padding-left="0.0104in" fo:padding-bottom="0.0104in" fo:padding-right="0.0104in"/>
    </style:style>
    <style:style style:name="TableRow185" style:family="table-row">
      <style:table-row-properties/>
    </style:style>
    <style:style style:name="TableCell186" style:family="table-cell">
      <style:table-cell-properties fo:border="none" style:writing-mode="lr-tb" style:vertical-align="middle" fo:padding-top="0.0104in" fo:padding-left="0.0104in" fo:padding-bottom="0.0104in" fo:padding-right="0.0104in"/>
    </style:style>
    <style:style style:name="TableCell187" style:family="table-cell">
      <style:table-cell-properties fo:border="none" style:writing-mode="lr-tb" style:vertical-align="middle" fo:padding-top="0.0104in" fo:padding-left="0.0104in" fo:padding-bottom="0.0104in" fo:padding-right="0.0104in"/>
    </style:style>
    <style:style style:name="TableCell188" style:family="table-cell">
      <style:table-cell-properties fo:border="none" style:writing-mode="lr-tb" style:vertical-align="middle" fo:padding-top="0.0104in" fo:padding-left="0.0104in" fo:padding-bottom="0.0104in" fo:padding-right="0.0104in"/>
    </style:style>
    <style:style style:name="TableCell189" style:family="table-cell">
      <style:table-cell-properties fo:border="none" style:writing-mode="lr-tb" style:vertical-align="middle" fo:padding-top="0.0104in" fo:padding-left="0.0104in" fo:padding-bottom="0.0104in" fo:padding-right="0.0104in"/>
    </style:style>
    <style:style style:name="TableCell190" style:family="table-cell">
      <style:table-cell-properties fo:border="none" style:writing-mode="lr-tb" style:vertical-align="middle" fo:padding-top="0.0104in" fo:padding-left="0.0104in" fo:padding-bottom="0.0104in" fo:padding-right="0.0104in"/>
    </style:style>
    <style:style style:name="TableRow191" style:family="table-row">
      <style:table-row-properties/>
    </style:style>
    <style:style style:name="TableCell192" style:family="table-cell">
      <style:table-cell-properties fo:border="none" style:writing-mode="lr-tb" style:vertical-align="middle" fo:padding-top="0.0104in" fo:padding-left="0.0104in" fo:padding-bottom="0.0104in" fo:padding-right="0.0104in"/>
    </style:style>
    <style:style style:name="TableCell193" style:family="table-cell">
      <style:table-cell-properties fo:border="none" style:writing-mode="lr-tb" style:vertical-align="middle" fo:padding-top="0.0104in" fo:padding-left="0.0104in" fo:padding-bottom="0.0104in" fo:padding-right="0.0104in"/>
    </style:style>
    <style:style style:name="TableCell194" style:family="table-cell">
      <style:table-cell-properties fo:border="none" style:writing-mode="lr-tb" style:vertical-align="middle" fo:padding-top="0.0104in" fo:padding-left="0.0104in" fo:padding-bottom="0.0104in" fo:padding-right="0.0104in"/>
    </style:style>
    <style:style style:name="TableCell195" style:family="table-cell">
      <style:table-cell-properties fo:border="none" style:writing-mode="lr-tb" style:vertical-align="middle" fo:padding-top="0.0104in" fo:padding-left="0.0104in" fo:padding-bottom="0.0104in" fo:padding-right="0.0104in"/>
    </style:style>
    <style:style style:name="TableCell196" style:family="table-cell">
      <style:table-cell-properties fo:border="none" style:writing-mode="lr-tb" style:vertical-align="middle" fo:padding-top="0.0104in" fo:padding-left="0.0104in" fo:padding-bottom="0.0104in" fo:padding-right="0.0104in"/>
    </style:style>
    <style:style style:name="P197" style:parent-style-name="Normal" style:family="paragraph">
      <style:text-properties fo:font-weight="bold" style:font-weight-asian="bold" style:font-weight-complex="bold"/>
    </style:style>
    <style:style style:name="T198" style:parent-style-name="Policepardéfaut" style:family="text">
      <style:text-properties fo:font-weight="bold" style:font-weight-asian="bold" style:font-weight-complex="bold"/>
    </style:style>
    <style:style style:name="P199" style:parent-style-name="Normal" style:list-style-name="LFO22" style:family="paragraph"/>
    <style:style style:name="P200" style:parent-style-name="Normal" style:list-style-name="LFO22" style:family="paragraph"/>
    <style:style style:name="P201" style:parent-style-name="Normal" style:list-style-name="LFO22" style:family="paragraph"/>
    <style:style style:name="P202" style:parent-style-name="Normal" style:list-style-name="LFO22" style:family="paragraph"/>
    <style:style style:name="P203" style:parent-style-name="Normal" style:list-style-name="LFO22" style:family="paragraph"/>
    <style:style style:name="T204" style:parent-style-name="Policepardéfaut" style:family="text">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Normal" style:family="paragraph">
      <style:text-properties fo:font-weight="bold" style:font-weight-asian="bold" style:font-weight-complex="bold"/>
    </style:style>
    <style:style style:name="P208" style:parent-style-name="Normal" style:family="paragraph">
      <style:text-properties fo:font-weight="bold" style:font-weight-asian="bold" style:font-weight-complex="bold"/>
    </style:style>
    <style:style style:name="P209" style:parent-style-name="Normal" style:family="paragraph">
      <style:text-properties fo:font-weight="bold" style:font-weight-asian="bold" style:font-weight-complex="bold"/>
    </style:style>
    <style:style style:name="P21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11" style:parent-style-name="Normal" style:family="paragraph">
      <style:text-properties fo:font-weight="bold" style:font-weight-asian="bold" style:font-weight-complex="bold"/>
    </style:style>
    <style:style style:name="T212" style:parent-style-name="Policepardéfaut" style:family="text">
      <style:text-properties fo:font-weight="bold" style:font-weight-asian="bold" style:font-weight-complex="bold"/>
    </style:style>
    <style:style style:name="P213" style:parent-style-name="Normal" style:list-style-name="LFO23" style:family="paragraph"/>
    <style:style style:name="T214" style:parent-style-name="Policepardéfaut" style:family="text">
      <style:text-properties fo:font-weight="bold" style:font-weight-asian="bold" style:font-weight-complex="bold"/>
    </style:style>
    <style:style style:name="P215" style:parent-style-name="Normal" style:list-style-name="LFO23" style:family="paragraph"/>
    <style:style style:name="T216" style:parent-style-name="Policepardéfaut" style:family="text">
      <style:text-properties fo:font-weight="bold" style:font-weight-asian="bold" style:font-weight-complex="bold"/>
    </style:style>
    <style:style style:name="P217" style:parent-style-name="Normal" style:family="paragraph">
      <style:text-properties fo:font-weight="bold" style:font-weight-asian="bold" style:font-weight-complex="bold"/>
    </style:style>
    <style:style style:name="P218" style:parent-style-name="Normal" style:family="paragraph">
      <style:text-properties fo:font-weight="bold" style:font-weight-asian="bold" style:font-weight-complex="bold"/>
    </style:style>
    <style:style style:name="T219" style:parent-style-name="Policepardéfaut" style:family="text">
      <style:text-properties fo:font-weight="bold" style:font-weight-asian="bold" style:font-weight-complex="bold"/>
    </style:style>
    <style:style style:name="P220" style:parent-style-name="Normal" style:family="paragraph">
      <style:text-properties fo:font-weight="bold" style:font-weight-asian="bold" style:font-weight-complex="bold"/>
    </style:style>
    <style:style style:name="P221" style:parent-style-name="Normal" style:list-style-name="LFO24" style:family="paragraph"/>
    <style:style style:name="T222" style:parent-style-name="Policepardéfaut" style:family="text">
      <style:text-properties fo:font-weight="bold" style:font-weight-asian="bold" style:font-weight-complex="bold"/>
    </style:style>
    <style:style style:name="P223" style:parent-style-name="Normal" style:list-style-name="LFO24" style:family="paragraph"/>
    <style:style style:name="T224" style:parent-style-name="Policepardéfaut" style:family="text">
      <style:text-properties fo:font-weight="bold" style:font-weight-asian="bold" style:font-weight-complex="bold"/>
    </style:style>
    <style:style style:name="P225" style:parent-style-name="Normal" style:list-style-name="LFO24" style:family="paragraph"/>
    <style:style style:name="T226" style:parent-style-name="Policepardéfaut" style:family="text">
      <style:text-properties fo:font-weight="bold" style:font-weight-asian="bold" style:font-weight-complex="bold"/>
    </style:style>
    <style:style style:name="P227" style:parent-style-name="Normal" style:list-style-name="LFO24" style:family="paragraph"/>
    <style:style style:name="T228" style:parent-style-name="Policepardéfaut" style:family="text">
      <style:text-properties fo:font-weight="bold" style:font-weight-asian="bold" style:font-weight-complex="bold"/>
    </style:style>
    <style:style style:name="P229" style:parent-style-name="Normal" style:list-style-name="LFO24" style:family="paragraph"/>
    <style:style style:name="T230" style:parent-style-name="Policepardéfaut" style:family="text">
      <style:text-properties fo:font-weight="bold" style:font-weight-asian="bold" style:font-weight-complex="bold"/>
    </style:style>
    <style:style style:name="T231" style:parent-style-name="Policepardéfaut" style:family="text">
      <style:text-properties fo:font-weight="bold" style:font-weight-asian="bold" style:font-weight-complex="bold"/>
    </style:style>
    <style:style style:name="P232" style:parent-style-name="Normal" style:family="paragraph">
      <style:text-properties fo:font-weight="bold" style:font-weight-asian="bold" style:font-weight-complex="bold"/>
    </style:style>
    <style:style style:name="T233" style:parent-style-name="Policepardéfaut" style:family="text">
      <style:text-properties fo:font-weight="bold" style:font-weight-asian="bold" style:font-weight-complex="bold"/>
    </style:style>
    <style:style style:name="T234" style:parent-style-name="Policepardéfaut" style:family="text">
      <style:text-properties fo:font-weight="bold" style:font-weight-asian="bold" style:font-weight-complex="bold"/>
    </style:style>
    <style:style style:name="T235" style:parent-style-name="Policepardéfaut" style:family="text">
      <style:text-properties fo:font-weight="bold" style:font-weight-asian="bold" style:font-weight-complex="bold"/>
    </style:style>
    <style:style style:name="P236" style:parent-style-name="Normal" style:family="paragraph">
      <style:text-properties fo:font-weight="bold" style:font-weight-asian="bold" style:font-weight-complex="bold"/>
    </style:style>
    <style:style style:name="T237" style:parent-style-name="Policepardéfaut" style:family="text">
      <style:text-properties fo:font-weight="bold" style:font-weight-asian="bold" style:font-weight-complex="bold"/>
    </style:style>
    <style:style style:name="T238" style:parent-style-name="Policepardéfaut" style:family="text">
      <style:text-properties fo:font-weight="bold" style:font-weight-asian="bold" style:font-weight-complex="bold"/>
    </style:style>
    <style:style style:name="T239" style:parent-style-name="Policepardéfaut" style:family="text">
      <style:text-properties fo:font-weight="bold" style:font-weight-asian="bold" style:font-weight-complex="bold"/>
    </style:style>
    <style:style style:name="P240" style:parent-style-name="Normal" style:family="paragraph">
      <style:text-properties fo:font-weight="bold" style:font-weight-asian="bold" style:font-weight-complex="bold"/>
    </style:style>
    <style:style style:name="P241" style:parent-style-name="Normal" style:family="paragraph">
      <style:text-properties fo:font-weight="bold" style:font-weight-asian="bold" style:font-weight-complex="bold"/>
    </style:style>
    <style:style style:name="T242" style:parent-style-name="Policepardéfaut" style:family="text">
      <style:text-properties fo:font-weight="bold" style:font-weight-asian="bold" style:font-weight-complex="bold"/>
    </style:style>
    <style:style style:name="P243" style:parent-style-name="Normal" style:family="paragraph">
      <style:text-properties fo:font-weight="bold" style:font-weight-asian="bold" style:font-weight-complex="bold"/>
    </style:style>
    <style:style style:name="P244" style:parent-style-name="Normal" style:list-style-name="LFO25" style:family="paragraph"/>
    <style:style style:name="T245" style:parent-style-name="Policepardéfaut" style:family="text">
      <style:text-properties fo:font-weight="bold" style:font-weight-asian="bold" style:font-weight-complex="bold"/>
    </style:style>
    <style:style style:name="P246" style:parent-style-name="Normal" style:list-style-name="LFO25" style:family="paragraph"/>
    <style:style style:name="T247" style:parent-style-name="Policepardéfaut" style:family="text">
      <style:text-properties fo:font-weight="bold" style:font-weight-asian="bold" style:font-weight-complex="bold"/>
    </style:style>
    <style:style style:name="P248" style:parent-style-name="Normal" style:list-style-name="LFO25" style:family="paragraph"/>
    <style:style style:name="T249" style:parent-style-name="Policepardéfaut" style:family="text">
      <style:text-properties fo:font-weight="bold" style:font-weight-asian="bold" style:font-weight-complex="bold"/>
    </style:style>
    <style:style style:name="P250" style:parent-style-name="Normal" style:family="paragraph">
      <style:text-properties fo:font-weight="bold" style:font-weight-asian="bold" style:font-weight-complex="bold"/>
    </style:style>
    <style:style style:name="T251" style:parent-style-name="Policepardéfaut" style:family="text">
      <style:text-properties fo:font-weight="bold" style:font-weight-asian="bold" style:font-weight-complex="bold"/>
    </style:style>
    <style:style style:name="T252" style:parent-style-name="Policepardéfaut" style:family="text">
      <style:text-properties fo:font-weight="bold" style:font-weight-asian="bold" style:font-weight-complex="bold"/>
    </style:style>
    <style:style style:name="T253" style:parent-style-name="Policepardéfaut" style:family="text">
      <style:text-properties fo:font-weight="bold" style:font-weight-asian="bold" style:font-weight-complex="bold"/>
    </style:style>
    <style:style style:name="P254" style:parent-style-name="Normal" style:family="paragraph">
      <style:text-properties fo:font-weight="bold" style:font-weight-asian="bold" style:font-weight-complex="bold"/>
    </style:style>
    <style:style style:name="T255" style:parent-style-name="Policepardéfaut" style:family="text">
      <style:text-properties fo:font-weight="bold" style:font-weight-asian="bold" style:font-weight-complex="bold"/>
    </style:style>
    <style:style style:name="T256" style:parent-style-name="Policepardéfaut" style:family="text">
      <style:text-properties fo:font-weight="bold" style:font-weight-asian="bold" style:font-weight-complex="bold"/>
    </style:style>
    <style:style style:name="T257" style:parent-style-name="Policepardéfaut" style:family="text">
      <style:text-properties fo:font-weight="bold" style:font-weight-asian="bold" style:font-weight-complex="bold"/>
    </style:style>
    <style:style style:name="P258" style:parent-style-name="Normal" style:family="paragraph">
      <style:text-properties fo:font-weight="bold" style:font-weight-asian="bold" style:font-weight-complex="bold"/>
    </style:style>
    <style:style style:name="P259" style:parent-style-name="Normal" style:family="paragraph">
      <style:text-properties fo:font-weight="bold" style:font-weight-asian="bold" style:font-weight-complex="bold"/>
    </style:style>
    <style:style style:name="T260" style:parent-style-name="Policepardéfaut" style:family="text">
      <style:text-properties fo:font-weight="bold" style:font-weight-asian="bold" style:font-weight-complex="bold"/>
    </style:style>
    <style:style style:name="P261" style:parent-style-name="Normal" style:family="paragraph">
      <style:text-properties fo:font-weight="bold" style:font-weight-asian="bold" style:font-weight-complex="bold"/>
    </style:style>
    <style:style style:name="T262" style:parent-style-name="Policepardéfaut" style:family="text">
      <style:text-properties fo:font-weight="bold" style:font-weight-asian="bold" style:font-weight-complex="bold"/>
    </style:style>
    <style:style style:name="P263" style:parent-style-name="Normal" style:family="paragraph">
      <style:text-properties fo:font-weight="bold" style:font-weight-asian="bold" style:font-weight-complex="bold"/>
    </style:style>
    <style:style style:name="T264" style:parent-style-name="Policepardéfaut" style:family="text">
      <style:text-properties fo:font-weight="bold" style:font-weight-asian="bold" style:font-weight-complex="bold"/>
    </style:style>
    <style:style style:name="T265" style:parent-style-name="Policepardéfaut" style:family="text">
      <style:text-properties fo:font-weight="bold" style:font-weight-asian="bold" style:font-weight-complex="bold"/>
    </style:style>
    <style:style style:name="T266" style:parent-style-name="Policepardéfaut" style:family="text">
      <style:text-properties fo:font-weight="bold" style:font-weight-asian="bold" style:font-weight-complex="bold"/>
    </style:style>
    <style:style style:name="P267" style:parent-style-name="Normal" style:family="paragraph">
      <style:text-properties fo:font-weight="bold" style:font-weight-asian="bold" style:font-weight-complex="bold"/>
    </style:style>
    <style:style style:name="T268" style:parent-style-name="Policepardéfaut" style:family="text">
      <style:text-properties fo:font-weight="bold" style:font-weight-asian="bold" style:font-weight-complex="bold"/>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fo:font-weight="bold" style:font-weight-asian="bold" style:font-weight-complex="bold"/>
    </style:style>
    <style:style style:name="P271" style:parent-style-name="Normal" style:family="paragraph">
      <style:text-properties fo:font-weight="bold" style:font-weight-asian="bold" style:font-weight-complex="bold"/>
    </style:style>
    <style:style style:name="P272" style:parent-style-name="Normal" style:family="paragraph">
      <style:text-properties fo:font-weight="bold" style:font-weight-asian="bold" style:font-weight-complex="bold"/>
    </style:style>
    <style:style style:name="T273" style:parent-style-name="Policepardéfaut" style:family="text">
      <style:text-properties fo:font-weight="bold" style:font-weight-asian="bold" style:font-weight-complex="bold"/>
    </style:style>
    <style:style style:name="P274" style:parent-style-name="Normal" style:family="paragraph">
      <style:text-properties fo:font-weight="bold" style:font-weight-asian="bold" style:font-weight-complex="bold"/>
    </style:style>
    <style:style style:name="P275" style:parent-style-name="Normal" style:list-style-name="LFO26" style:family="paragraph"/>
    <style:style style:name="P276" style:parent-style-name="Normal" style:list-style-name="LFO26" style:family="paragraph"/>
    <style:style style:name="P277" style:parent-style-name="Normal" style:list-style-name="LFO26" style:family="paragraph"/>
    <style:style style:name="P278" style:parent-style-name="Normal" style:list-style-name="LFO26" style:family="paragraph"/>
    <style:style style:name="T279" style:parent-style-name="Policepardéfaut" style:family="text">
      <style:text-properties fo:font-weight="bold" style:font-weight-asian="bold" style:font-weight-complex="bold"/>
    </style:style>
    <style:style style:name="P280" style:parent-style-name="Normal" style:family="paragraph">
      <style:text-properties fo:font-weight="bold" style:font-weight-asian="bold" style:font-weight-complex="bold"/>
    </style:style>
    <style:style style:name="T281" style:parent-style-name="Policepardéfaut" style:family="text">
      <style:text-properties fo:font-weight="bold" style:font-weight-asian="bold" style:font-weight-complex="bold"/>
    </style:style>
    <style:style style:name="T282" style:parent-style-name="Policepardéfaut" style:family="text">
      <style:text-properties fo:font-weight="bold" style:font-weight-asian="bold" style:font-weight-complex="bold"/>
    </style:style>
    <style:style style:name="T283" style:parent-style-name="Policepardéfaut" style:family="text">
      <style:text-properties fo:font-weight="bold" style:font-weight-asian="bold" style:font-weight-complex="bold"/>
    </style:style>
    <style:style style:name="P284" style:parent-style-name="Normal" style:family="paragraph">
      <style:text-properties fo:font-weight="bold" style:font-weight-asian="bold" style:font-weight-complex="bold"/>
    </style:style>
    <style:style style:name="T285" style:parent-style-name="Policepardéfaut" style:family="text">
      <style:text-properties fo:font-weight="bold" style:font-weight-asian="bold" style:font-weight-complex="bold"/>
    </style:style>
    <style:style style:name="T286" style:parent-style-name="Policepardéfaut" style:family="text">
      <style:text-properties fo:font-weight="bold" style:font-weight-asian="bold" style:font-weight-complex="bold"/>
    </style:style>
    <style:style style:name="T287" style:parent-style-name="Policepardéfaut" style:family="text">
      <style:text-properties fo:font-weight="bold" style:font-weight-asian="bold" style:font-weight-complex="bold"/>
    </style:style>
    <style:style style:name="P288" style:parent-style-name="Normal" style:family="paragraph">
      <style:text-properties fo:font-weight="bold" style:font-weight-asian="bold" style:font-weight-complex="bold"/>
    </style:style>
    <style:style style:name="TableColumn290" style:family="table-column">
      <style:table-column-properties style:column-width="0.7138in"/>
    </style:style>
    <style:style style:name="TableColumn291" style:family="table-column">
      <style:table-column-properties style:column-width="1.3444in"/>
    </style:style>
    <style:style style:name="TableColumn292" style:family="table-column">
      <style:table-column-properties style:column-width="1.3125in"/>
    </style:style>
    <style:style style:name="TableColumn293" style:family="table-column">
      <style:table-column-properties style:column-width="1.4638in"/>
    </style:style>
    <style:style style:name="TableColumn294" style:family="table-column">
      <style:table-column-properties style:column-width="1.4652in"/>
    </style:style>
    <style:style style:name="Table289" style:family="table">
      <style:table-properties style:width="6.3in" fo:margin-left="0in" table:align="left"/>
    </style:style>
    <style:style style:name="TableRow295" style:family="table-row">
      <style:table-row-properties/>
    </style:style>
    <style:style style:name="TableCell296" style:family="table-cell">
      <style:table-cell-properties fo:border="none" style:writing-mode="lr-tb" style:vertical-align="middle" fo:padding-top="0.0104in" fo:padding-left="0.0104in" fo:padding-bottom="0.0104in" fo:padding-right="0.0104in"/>
    </style:style>
    <style:style style:name="P297" style:parent-style-name="Normal" style:family="paragraph">
      <style:text-properties fo:font-weight="bold" style:font-weight-asian="bold" style:font-weight-complex="bold"/>
    </style:style>
    <style:style style:name="TableCell298" style:family="table-cell">
      <style:table-cell-properties fo:border="none" style:writing-mode="lr-tb" style:vertical-align="middle" fo:padding-top="0.0104in" fo:padding-left="0.0104in" fo:padding-bottom="0.0104in" fo:padding-right="0.0104in"/>
    </style:style>
    <style:style style:name="P299" style:parent-style-name="Normal" style:family="paragraph">
      <style:text-properties fo:font-weight="bold" style:font-weight-asian="bold" style:font-weight-complex="bold"/>
    </style:style>
    <style:style style:name="TableCell300" style:family="table-cell">
      <style:table-cell-properties fo:border="none" style:writing-mode="lr-tb" style:vertical-align="middle" fo:padding-top="0.0104in" fo:padding-left="0.0104in" fo:padding-bottom="0.0104in" fo:padding-right="0.0104in"/>
    </style:style>
    <style:style style:name="P301" style:parent-style-name="Normal" style:family="paragraph">
      <style:text-properties fo:font-weight="bold" style:font-weight-asian="bold" style:font-weight-complex="bold"/>
    </style:style>
    <style:style style:name="TableCell302" style:family="table-cell">
      <style:table-cell-properties fo:border="none" style:writing-mode="lr-tb" style:vertical-align="middle" fo:padding-top="0.0104in" fo:padding-left="0.0104in" fo:padding-bottom="0.0104in" fo:padding-right="0.0104in"/>
    </style:style>
    <style:style style:name="P303" style:parent-style-name="Normal" style:family="paragraph">
      <style:text-properties fo:font-weight="bold" style:font-weight-asian="bold" style:font-weight-complex="bold"/>
    </style:style>
    <style:style style:name="TableCell304" style:family="table-cell">
      <style:table-cell-properties fo:border="none" style:writing-mode="lr-tb" style:vertical-align="middle" fo:padding-top="0.0104in" fo:padding-left="0.0104in" fo:padding-bottom="0.0104in" fo:padding-right="0.0104in"/>
    </style:style>
    <style:style style:name="P305" style:parent-style-name="Normal" style:family="paragraph">
      <style:text-properties fo:font-weight="bold" style:font-weight-asian="bold" style:font-weight-complex="bold"/>
    </style:style>
    <style:style style:name="TableRow306" style:family="table-row">
      <style:table-row-properties/>
    </style:style>
    <style:style style:name="TableCell307" style:family="table-cell">
      <style:table-cell-properties fo:border="none" style:writing-mode="lr-tb" style:vertical-align="middle" fo:padding-top="0.0104in" fo:padding-left="0.0104in" fo:padding-bottom="0.0104in" fo:padding-right="0.0104in"/>
    </style:style>
    <style:style style:name="T308" style:parent-style-name="Policepardéfaut" style:family="text">
      <style:text-properties fo:font-weight="bold" style:font-weight-asian="bold" style:font-weight-complex="bold"/>
    </style:style>
    <style:style style:name="TableCell309" style:family="table-cell">
      <style:table-cell-properties fo:border="none" style:writing-mode="lr-tb" style:vertical-align="middle" fo:padding-top="0.0104in" fo:padding-left="0.0104in" fo:padding-bottom="0.0104in" fo:padding-right="0.0104in"/>
    </style:style>
    <style:style style:name="TableCell310" style:family="table-cell">
      <style:table-cell-properties fo:border="none" style:writing-mode="lr-tb" style:vertical-align="middle" fo:padding-top="0.0104in" fo:padding-left="0.0104in" fo:padding-bottom="0.0104in" fo:padding-right="0.0104in"/>
    </style:style>
    <style:style style:name="T311" style:parent-style-name="Policepardéfaut" style:family="text">
      <style:text-properties fo:font-weight="bold" style:font-weight-asian="bold" style:font-weight-complex="bold"/>
    </style:style>
    <style:style style:name="TableCell312" style:family="table-cell">
      <style:table-cell-properties fo:border="none" style:writing-mode="lr-tb" style:vertical-align="middle" fo:padding-top="0.0104in" fo:padding-left="0.0104in" fo:padding-bottom="0.0104in" fo:padding-right="0.0104in"/>
    </style:style>
    <style:style style:name="TableCell313" style:family="table-cell">
      <style:table-cell-properties fo:border="none" style:writing-mode="lr-tb" style:vertical-align="middle" fo:padding-top="0.0104in" fo:padding-left="0.0104in" fo:padding-bottom="0.0104in" fo:padding-right="0.0104in"/>
    </style:style>
    <style:style style:name="TableRow314" style:family="table-row">
      <style:table-row-properties/>
    </style:style>
    <style:style style:name="TableCell315" style:family="table-cell">
      <style:table-cell-properties fo:border="none" style:writing-mode="lr-tb" style:vertical-align="middle" fo:padding-top="0.0104in" fo:padding-left="0.0104in" fo:padding-bottom="0.0104in" fo:padding-right="0.0104in"/>
    </style:style>
    <style:style style:name="T316" style:parent-style-name="Policepardéfaut" style:family="text">
      <style:text-properties fo:font-weight="bold" style:font-weight-asian="bold" style:font-weight-complex="bold"/>
    </style:style>
    <style:style style:name="TableCell317" style:family="table-cell">
      <style:table-cell-properties fo:border="none" style:writing-mode="lr-tb" style:vertical-align="middle" fo:padding-top="0.0104in" fo:padding-left="0.0104in" fo:padding-bottom="0.0104in" fo:padding-right="0.0104in"/>
    </style:style>
    <style:style style:name="TableCell318" style:family="table-cell">
      <style:table-cell-properties fo:border="none" style:writing-mode="lr-tb" style:vertical-align="middle" fo:padding-top="0.0104in" fo:padding-left="0.0104in" fo:padding-bottom="0.0104in" fo:padding-right="0.0104in"/>
    </style:style>
    <style:style style:name="T319" style:parent-style-name="Policepardéfaut" style:family="text">
      <style:text-properties fo:font-weight="bold" style:font-weight-asian="bold" style:font-weight-complex="bold"/>
    </style:style>
    <style:style style:name="TableCell320" style:family="table-cell">
      <style:table-cell-properties fo:border="none" style:writing-mode="lr-tb" style:vertical-align="middle" fo:padding-top="0.0104in" fo:padding-left="0.0104in" fo:padding-bottom="0.0104in" fo:padding-right="0.0104in"/>
    </style:style>
    <style:style style:name="TableCell321" style:family="table-cell">
      <style:table-cell-properties fo:border="none" style:writing-mode="lr-tb" style:vertical-align="middle" fo:padding-top="0.0104in" fo:padding-left="0.0104in" fo:padding-bottom="0.0104in" fo:padding-right="0.0104in"/>
    </style:style>
    <style:style style:name="TableRow322" style:family="table-row">
      <style:table-row-properties/>
    </style:style>
    <style:style style:name="TableCell323" style:family="table-cell">
      <style:table-cell-properties fo:border="none" style:writing-mode="lr-tb" style:vertical-align="middle" fo:padding-top="0.0104in" fo:padding-left="0.0104in" fo:padding-bottom="0.0104in" fo:padding-right="0.0104in"/>
    </style:style>
    <style:style style:name="T324" style:parent-style-name="Policepardéfaut" style:family="text">
      <style:text-properties fo:font-weight="bold" style:font-weight-asian="bold" style:font-weight-complex="bold"/>
    </style:style>
    <style:style style:name="TableCell325" style:family="table-cell">
      <style:table-cell-properties fo:border="none" style:writing-mode="lr-tb" style:vertical-align="middle" fo:padding-top="0.0104in" fo:padding-left="0.0104in" fo:padding-bottom="0.0104in" fo:padding-right="0.0104in"/>
    </style:style>
    <style:style style:name="TableCell326" style:family="table-cell">
      <style:table-cell-properties fo:border="none" style:writing-mode="lr-tb" style:vertical-align="middle" fo:padding-top="0.0104in" fo:padding-left="0.0104in" fo:padding-bottom="0.0104in" fo:padding-right="0.0104in"/>
    </style:style>
    <style:style style:name="T327" style:parent-style-name="Policepardéfaut" style:family="text">
      <style:text-properties fo:font-weight="bold" style:font-weight-asian="bold" style:font-weight-complex="bold"/>
    </style:style>
    <style:style style:name="TableCell328" style:family="table-cell">
      <style:table-cell-properties fo:border="none" style:writing-mode="lr-tb" style:vertical-align="middle" fo:padding-top="0.0104in" fo:padding-left="0.0104in" fo:padding-bottom="0.0104in" fo:padding-right="0.0104in"/>
    </style:style>
    <style:style style:name="TableCell329" style:family="table-cell">
      <style:table-cell-properties fo:border="none" style:writing-mode="lr-tb" style:vertical-align="middle" fo:padding-top="0.0104in" fo:padding-left="0.0104in" fo:padding-bottom="0.0104in" fo:padding-right="0.0104in"/>
    </style:style>
    <style:style style:name="TableRow330" style:family="table-row">
      <style:table-row-properties/>
    </style:style>
    <style:style style:name="TableCell331" style:family="table-cell">
      <style:table-cell-properties fo:border="none" style:writing-mode="lr-tb" style:vertical-align="middle" fo:padding-top="0.0104in" fo:padding-left="0.0104in" fo:padding-bottom="0.0104in" fo:padding-right="0.0104in"/>
    </style:style>
    <style:style style:name="T332" style:parent-style-name="Policepardéfaut" style:family="text">
      <style:text-properties fo:font-weight="bold" style:font-weight-asian="bold" style:font-weight-complex="bold"/>
    </style:style>
    <style:style style:name="TableCell333" style:family="table-cell">
      <style:table-cell-properties fo:border="none" style:writing-mode="lr-tb" style:vertical-align="middle" fo:padding-top="0.0104in" fo:padding-left="0.0104in" fo:padding-bottom="0.0104in" fo:padding-right="0.0104in"/>
    </style:style>
    <style:style style:name="TableCell334" style:family="table-cell">
      <style:table-cell-properties fo:border="none" style:writing-mode="lr-tb" style:vertical-align="middle" fo:padding-top="0.0104in" fo:padding-left="0.0104in" fo:padding-bottom="0.0104in" fo:padding-right="0.0104in"/>
    </style:style>
    <style:style style:name="T335" style:parent-style-name="Policepardéfaut" style:family="text">
      <style:text-properties fo:font-weight="bold" style:font-weight-asian="bold" style:font-weight-complex="bold"/>
    </style:style>
    <style:style style:name="TableCell336" style:family="table-cell">
      <style:table-cell-properties fo:border="none" style:writing-mode="lr-tb" style:vertical-align="middle" fo:padding-top="0.0104in" fo:padding-left="0.0104in" fo:padding-bottom="0.0104in" fo:padding-right="0.0104in"/>
    </style:style>
    <style:style style:name="TableCell337" style:family="table-cell">
      <style:table-cell-properties fo:border="none" style:writing-mode="lr-tb" style:vertical-align="middle" fo:padding-top="0.0104in" fo:padding-left="0.0104in" fo:padding-bottom="0.0104in" fo:padding-right="0.0104in"/>
    </style:style>
    <style:style style:name="P338" style:parent-style-name="Normal" style:family="paragraph">
      <style:text-properties fo:font-weight="bold" style:font-weight-asian="bold" style:font-weight-complex="bold"/>
    </style:style>
    <style:style style:name="P339" style:parent-style-name="Normal" style:family="paragraph">
      <style:text-properties fo:font-weight="bold" style:font-weight-asian="bold" style:font-weight-complex="bold"/>
    </style:style>
    <style:style style:name="P340" style:parent-style-name="Normal" style:list-style-name="LFO27" style:family="paragraph"/>
    <style:style style:name="P341" style:parent-style-name="Normal" style:list-style-name="LFO27" style:family="paragraph"/>
    <style:style style:name="P342" style:parent-style-name="Normal" style:list-style-name="LFO27" style:family="paragraph"/>
    <style:style style:name="P343" style:parent-style-name="Normal" style:list-style-name="LFO27" style:family="paragraph"/>
    <style:style style:name="P344" style:parent-style-name="Normal" style:list-style-name="LFO27" style:family="paragraph"/>
    <style:style style:name="T345" style:parent-style-name="Policepardéfaut" style:family="text">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T347" style:parent-style-name="Policepardéfaut" style:family="text">
      <style:text-properties fo:font-weight="bold" style:font-weight-asian="bold" style:font-weight-complex="bold"/>
    </style:style>
    <style:style style:name="P348" style:parent-style-name="Normal" style:list-style-name="LFO28" style:family="paragraph"/>
    <style:style style:name="P349" style:parent-style-name="Normal" style:list-style-name="LFO28" style:family="paragraph"/>
    <style:style style:name="P350" style:parent-style-name="Normal" style:list-style-name="LFO28" style:family="paragraph"/>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list-style-name="LFO29" style:family="paragraph"/>
    <style:style style:name="T354" style:parent-style-name="Policepardéfaut" style:family="text">
      <style:text-properties fo:font-weight="bold" style:font-weight-asian="bold" style:font-weight-complex="bold"/>
    </style:style>
    <style:style style:name="P355" style:parent-style-name="Normal" style:list-style-name="LFO29" style:family="paragraph"/>
    <style:style style:name="T356" style:parent-style-name="Policepardéfaut" style:family="text">
      <style:text-properties fo:font-weight="bold" style:font-weight-asian="bold" style:font-weight-complex="bold"/>
    </style:style>
    <style:style style:name="P357" style:parent-style-name="Normal" style:list-style-name="LFO29" style:family="paragraph"/>
    <style:style style:name="T358" style:parent-style-name="Policepardéfaut" style:family="text">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P360" style:parent-style-name="Normal" style:list-style-name="LFO30" style:family="paragraph"/>
    <style:style style:name="T361" style:parent-style-name="Policepardéfaut" style:family="text">
      <style:text-properties fo:font-weight="bold" style:font-weight-asian="bold" style:font-weight-complex="bold"/>
    </style:style>
    <style:style style:name="P362" style:parent-style-name="Normal" style:list-style-name="LFO30" style:family="paragraph"/>
    <style:style style:name="T363" style:parent-style-name="Policepardéfaut" style:family="text">
      <style:text-properties fo:font-weight="bold" style:font-weight-asian="bold" style:font-weight-complex="bold"/>
    </style:style>
    <style:style style:name="P364" style:parent-style-name="Normal" style:list-style-name="LFO30" style:family="paragraph"/>
    <style:style style:name="T365" style:parent-style-name="Policepardéfaut" style:family="text">
      <style:text-properties fo:font-weight="bold" style:font-weight-asian="bold" style:font-weight-complex="bold"/>
    </style:style>
    <style:style style:name="P366" style:parent-style-name="Normal" style:list-style-name="LFO30" style:family="paragraph"/>
    <style:style style:name="P367" style:parent-style-name="Normal" style:family="paragraph">
      <style:text-properties fo:font-weight="bold" style:font-weight-asian="bold" style:font-weight-complex="bold"/>
    </style:style>
    <style:style style:name="P368" style:parent-style-name="Normal" style:list-style-name="LFO31" style:family="paragraph"/>
    <style:style style:name="P369" style:parent-style-name="Normal" style:list-style-name="LFO31" style:family="paragraph"/>
    <style:style style:name="P370" style:parent-style-name="Normal" style:list-style-name="LFO31" style:family="paragraph"/>
    <style:style style:name="P371" style:parent-style-name="Normal" style:list-style-name="LFO31" style:family="paragraph"/>
    <style:style style:name="P372" style:parent-style-name="Normal" style:list-style-name="LFO31" style:family="paragraph"/>
    <style:style style:name="P373" style:parent-style-name="Normal" style:list-style-name="LFO31" style:family="paragraph"/>
    <style:style style:name="P374" style:parent-style-name="Normal" style:family="paragraph">
      <style:text-properties fo:font-weight="bold" style:font-weight-asian="bold" style:font-weight-complex="bold"/>
    </style:style>
    <style:style style:name="P375" style:parent-style-name="Normal" style:list-style-name="LFO32" style:family="paragraph"/>
    <style:style style:name="P376" style:parent-style-name="Normal" style:list-style-name="LFO32" style:family="paragraph"/>
    <style:style style:name="P377" style:parent-style-name="Normal" style:list-style-name="LFO32" style:family="paragraph"/>
    <style:style style:name="P378" style:parent-style-name="Normal" style:list-style-name="LFO32" style:family="paragraph"/>
    <style:style style:name="P379" style:parent-style-name="Normal" style:list-style-name="LFO32" style:family="paragraph"/>
    <style:style style:name="P380" style:parent-style-name="Normal" style:list-style-name="LFO32" style:family="paragraph"/>
    <style:style style:name="P381" style:parent-style-name="Normal" style:list-style-name="LFO32" style:family="paragraph"/>
    <style:style style:name="P382" style:parent-style-name="Normal" style:list-style-name="LFO32" style:family="paragraph"/>
    <style:style style:name="P383" style:parent-style-name="Normal" style:family="paragraph">
      <style:text-properties fo:font-weight="bold" style:font-weight-asian="bold" style:font-weight-complex="bold"/>
    </style:style>
    <style:style style:name="T384" style:parent-style-name="Policepardéfaut" style:family="text">
      <style:text-properties fo:font-weight="bold" style:font-weight-asian="bold" style:font-weight-complex="bold"/>
    </style:style>
    <style:style style:name="P385" style:parent-style-name="Normal" style:list-style-name="LFO33" style:family="paragraph"/>
    <style:style style:name="P386" style:parent-style-name="Normal" style:list-style-name="LFO33" style:family="paragraph"/>
    <style:style style:name="P387" style:parent-style-name="Normal" style:list-style-name="LFO33" style:family="paragraph"/>
    <style:style style:name="P388" style:parent-style-name="Normal" style:list-style-name="LFO33" style:family="paragraph"/>
    <style:style style:name="P389" style:parent-style-name="Normal" style:list-style-name="LFO33" style:family="paragraph"/>
    <style:style style:name="P390" style:parent-style-name="Normal" style:list-style-name="LFO33" style:family="paragraph"/>
    <style:style style:name="P391" style:parent-style-name="Normal" style:list-style-name="LFO33" style:family="paragraph"/>
    <style:style style:name="P392" style:parent-style-name="Normal" style:family="paragraph">
      <style:text-properties fo:font-weight="bold" style:font-weight-asian="bold" style:font-weight-complex="bold"/>
    </style:style>
    <style:style style:name="T393" style:parent-style-name="Policepardéfaut" style:family="text">
      <style:text-properties fo:font-weight="bold" style:font-weight-asian="bold" style:font-weight-complex="bold"/>
    </style:style>
    <style:style style:name="P394" style:parent-style-name="Normal" style:list-style-name="LFO34" style:family="paragraph"/>
    <style:style style:name="P395" style:parent-style-name="Normal" style:list-style-name="LFO34" style:family="paragraph"/>
    <style:style style:name="P396" style:parent-style-name="Normal" style:list-style-name="LFO34" style:family="paragraph"/>
    <style:style style:name="T397" style:parent-style-name="Policepardéfaut" style:family="text">
      <style:text-properties fo:font-weight="bold" style:font-weight-asian="bold" style:font-weight-complex="bold"/>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ST PROMPT TERRA MODE élevé</text:p>
      <text:p text:style-name="Normal">Analyse réalisée sur les informations publiques vérifiées au 17 juillet 2026. Point clé : Pennylane et Cegid sont surtout des suites de gestion/facturation ; Upflow et Billabex sont des spécialistes du recouvrement qui se connectent aux outils existants. Ce ne sont donc pas des concurrents parfaitement symétriques.</text:p>
      <text:p text:style-name="P2">Pennylane</text:p>
      <text:p text:style-name="Normal"><text:span text:style-name="T3">Positionnement.</text:span><text:s/>Plateforme française tout-en-un de gestion financière : facturation, achats, compte pro, trésorerie et comptabilité collaborative avec l’expert-comptable. Le recouvrement est une fonctionnalité intégrée, avec relances automatiques à partir du plan Essentiel.<text:s/><text:a xlink:href="https://www.pennylane.com/fr/independants" office:target-frame-name="_top" xlink:show="replace"><text:span text:style-name="Lienhypertexte">Pennylane — offres indépendants</text:span></text:a>,<text:s/><text:a xlink:href="https://help.pennylane.com/fr/articles/225076-questions-frequentes-sur-l-editeur-de-factures" office:target-frame-name="_top" xlink:show="replace"><text:span text:style-name="Lienhypertexte">FAQ facturation</text:span></text:a></text:p>
      <text:p text:style-name="Normal"><text:span text:style-name="T4">Prix public.</text:span><text:s/>À partir de 14 € HT/mois (Basique), 24 € (Essentiel), 79 € (Premium avec comptabilité) pour indépendants. Pour des structures de 6–15 salariés, les offres affichées vont de 49 € à 298 € HT/mois ; une offre sur mesure existe au-delà.<text:s/><text:a xlink:href="https://www.pennylane.com/fr/tarifs/medium" office:target-frame-name="_top" xlink:show="replace"><text:span text:style-name="Lienhypertexte">Tarifs Pennylane</text:span></text:a></text:p>
      <text:p text:style-name="Normal"><text:span text:style-name="T5">Forces visibles.</text:span></text:p>
      <text:list text:style-name="LFO1" text:continue-numbering="true">
        <text:list-item>
          <text:p text:style-name="P6">Suite très intégrée : facturation, paiements, banque, dépenses, trésorerie et comptabilité au même endroit.</text:p>
        </text:list-item>
        <text:list-item>
          <text:p text:style-name="P7">Forte proposition de valeur réglementaire française : facture électronique incluse et plateforme agréée.</text:p>
        </text:list-item>
        <text:list-item>
          <text:p text:style-name="P8">Distribution via les cabinets comptables, UX moderne et écosystème d’intégrations.</text:p>
        </text:list-item>
      </text:list>
      <text:p text:style-name="Normal"><text:span text:style-name="T9">Faiblesses / axes d’amélioration perçus.</text:span></text:p>
      <text:list text:style-name="LFO2" text:continue-numbering="true">
        <text:list-item>
          <text:p text:style-name="P10">Risque de surdimensionnement pour une TPE qui cherche uniquement à facturer et relancer.</text:p>
        </text:list-item>
        <text:list-item>
          <text:p text:style-name="P11">Le recouvrement n’est pas son cœur de produit : sophistication AR, traitement des litiges et orchestration de relances peuvent être moins profonds qu’un spécialiste.</text:p>
        </text:list-item>
        <text:list-item>
          <text:p text:style-name="P12">Des avis mentionnent ponctuellement bugs, intégrations ou délais de support, malgré une note globale élevée.<text:s/><text:a xlink:href="https://fr.trustpilot.com/review/pennylane.com" office:target-frame-name="_top" xlink:show="replace"><text:span text:style-name="Lienhypertexte">Avis Trustpilot</text:span></text:a></text:p>
        </text:list-item>
      </text:list>
      <text:p text:style-name="P13">Cegid</text:p>
      <text:p text:style-name="Normal"><text:span text:style-name="T14">Positionnement.</text:span><text:s/>Éditeur historique de gestion/ERP, couvrant la facturation depuis la TPE jusqu’aux PME complexes et groupes. Son avantage est la profondeur métier, l’intégration comptable et la conformité ; en Belgique, Cegid Invoice &amp; Financing cible clairement les TPE autour de Peppol et de la trésorerie.<text:s/><text:a xlink:href="https://go.cegid.com/logiciel-gestion.html" office:target-frame-name="_top" xlink:show="replace"><text:span text:style-name="Lienhypertexte">Cegid — gestion PME</text:span></text:a>,<text:s/><text:a xlink:href="https://www.cegid.com/fr/produits/cegid-invoice-financing/" office:target-frame-name="_top" xlink:show="replace"><text:span text:style-name="Lienhypertexte">Cegid Invoice &amp; Financing</text:span></text:a></text:p>
      <text:p text:style-name="Normal"><text:span text:style-name="T15">Prix public.</text:span><text:s/>Pour l’offre belge Cegid Invoice : 4 €, 17,95 €, 31,95 € et 53,95 € HT/mois selon le plan. En France, les offres ERP/gestion commerciale sont majoritairement sur devis ; un comparateur de plateformes agréées affiche BIM! TPE dès 3 €/mois, Cegid Invoice à 17,95 € et les offres entreprise sur devis.<text:s/><text:a xlink:href="https://www.cegid.com/fr/produits/cegid-invoice-financing/" office:target-frame-name="_top" xlink:show="replace"><text:span text:style-name="Lienhypertexte">Tarifs belges officiels</text:span></text:a>,<text:s/><text:a xlink:href="https://www.infos-pa.com/plateformes/cegid/tarifs" office:target-frame-name="_top" xlink:show="replace"><text:span text:style-name="Lienhypertexte">repères de tarifs France</text:span></text:a></text:p>
      <text:p text:style-name="Normal"><text:span text:style-name="T16">Forces visibles.</text:span></text:p>
      <text:list text:style-name="LFO3" text:continue-numbering="true">
        <text:list-item>
          <text:p text:style-name="P17">Large couverture fonctionnelle et sectorielle : comptabilité, paie, CRM, gestion commerciale, stocks, production.</text:p>
        </text:list-item>
        <text:list-item>
          <text:p text:style-name="P18">Crédibilité de conformité et capacité à gérer les organisations multi-entités ou complexes.</text:p>
        </text:list-item>
        <text:list-item>
          <text:p text:style-name="P19">Réseau installé auprès des experts-comptables et des PME établies.</text:p>
        </text:list-item>
      </text:list>
      <text:p text:style-name="Normal"><text:span text:style-name="T20">Faiblesses / axes d’amélioration perçus.</text:span></text:p>
      <text:list text:style-name="LFO4" text:continue-numbering="true">
        <text:list-item>
          <text:p text:style-name="P21">Complexité et coût/paramétrage potentiellement excessifs pour les petites structures.</text:p>
        </text:list-item>
        <text:list-item>
          <text:p text:style-name="P22">Tarification des offres françaises avancées souvent peu lisible avant contact commercial.</text:p>
        </text:list-item>
        <text:list-item>
          <text:p text:style-name="P23">Les retours publics pointent surtout support, bugs et ergonomie ; ils concernent plusieurs produits Cegid et doivent donc être lus comme un signal de marque, non comme une conclusion sur chaque module.<text:s/><text:a xlink:href="https://fr.trustpilot.com/review/cegid.com" office:target-frame-name="_top" xlink:show="replace"><text:span text:style-name="Lienhypertexte">Avis Cegid</text:span></text:a></text:p>
        </text:list-item>
      </text:list>
      <text:p text:style-name="P24">Upflow</text:p>
      <text:p text:style-name="Normal"><text:span text:style-name="T25">Positionnement.</text:span><text:s/>Spécialiste international de l’<text:span text:style-name="T26">Accounts Receivable automation</text:span><text:s/>/ « Financial Relationship Management » : visibilité sur les créances, segmentation, campagnes de relance personnalisées et collaboration finance–sales–customer success. Il cible explicitement les start-ups et scale-ups, avec des paliers jusqu’aux entreprises de plus de 50 M$ d’ARR.<text:s/><text:a xlink:href="https://upflow.io/pricing" office:target-frame-name="_top" xlink:show="replace"><text:span text:style-name="Lienhypertexte">Tarifs Upflow</text:span></text:a></text:p>
      <text:p text:style-name="Normal"><text:span text:style-name="T27">Prix public.</text:span><text:s/>Offre<text:s/><text:span text:style-name="T28">Discover</text:span><text:s/>gratuite à vie pour l’analytique/benchmark. Les offres Grow, Scale et Strategic sont sur devis : aucun prix public pour l’automatisation complète.</text:p>
      <text:p text:style-name="Normal"><text:span text:style-name="T29">Forces visibles.</text:span></text:p>
      <text:list text:style-name="LFO5" text:continue-numbering="true">
        <text:list-item>
          <text:p text:style-name="P30">Profondeur produit sur le poste client : priorisation, scénarios, portail client, historique et collaboration transverse.</text:p>
        </text:list-item>
        <text:list-item>
          <text:p text:style-name="P31">Très bonne perception utilisateur : 4,8/5 sur 231 avis G2, notamment pour l’ergonomie, les relances automatisées et le gain de temps.</text:p>
        </text:list-item>
        <text:list-item>
          <text:p text:style-name="P32">Positionnement clair pour les équipes finance B2B qui ont déjà un ERP ou un outil de facturation.<text:s/><text:a xlink:href="https://www.g2.com/products/upflow-upflow/reviews" office:target-frame-name="_top" xlink:show="replace"><text:span text:style-name="Lienhypertexte">Avis Upflow sur G2</text:span></text:a></text:p>
        </text:list-item>
      </text:list>
      <text:p text:style-name="Normal"><text:span text:style-name="T33">Faiblesses / axes d’amélioration perçus.</text:span></text:p>
      <text:list text:style-name="LFO6" text:continue-numbering="true">
        <text:list-item>
          <text:p text:style-name="P34">Peu adapté, en apparence, à une micro-TPE sans équipe finance : le discours et les segments tarifaires sont orientés ARR/start-up/scale-up.</text:p>
        </text:list-item>
        <text:list-item>
          <text:p text:style-name="P35">Prix payants non publics, ce qui freine l’auto-évaluation par les PME.</text:p>
        </text:list-item>
        <text:list-item>
          <text:p text:style-name="P36">Les utilisateurs demandent davantage de souplesse sur reporting, filtres, modèles d’e-mails et certaines intégrations.<text:s/><text:a xlink:href="https://www.g2.com/products/upflow-upflow/reviews" office:target-frame-name="_top" xlink:show="replace"><text:span text:style-name="Lienhypertexte">Avis Upflow sur G2</text:span></text:a></text:p>
        </text:list-item>
      </text:list>
      <text:p text:style-name="P37">Billabex</text:p>
      <text:p text:style-name="Normal"><text:span text:style-name="T38">Positionnement.</text:span><text:s/>Agent IA B2B de recouvrement amiable autonome : il détecte les retards, choisit le canal et le ton, répond aux clients, suit les promesses de paiement et sollicite l’humain pour les décisions sensibles. Il se présente comme une couche connectée à l’ERP/facturation, plutôt que comme un outil comptable complet.<text:s/><text:a xlink:href="https://www.billabex.com/fr/" office:target-frame-name="_top" xlink:show="replace"><text:span text:style-name="Lienhypertexte">Billabex — produit</text:span></text:a>,<text:s/><text:a xlink:href="https://www.billabex.com/fr/pourquoi-billabex/" office:target-frame-name="_top" xlink:show="replace"><text:span text:style-name="Lienhypertexte">fonctionnement de l’agent</text:span></text:a></text:p>
      <text:p text:style-name="Normal"><text:span text:style-name="T39">Prix public.</text:span><text:s/>Aucun montant affiché. L’offre est sur devis ; les conditions indiquent une facturation mensuelle selon le nombre de « débiteurs actifs » durant la période.<text:s/><text:a xlink:href="https://www.billabex.com/en/pricing/" office:target-frame-name="_top" xlink:show="replace"><text:span text:style-name="Lienhypertexte">Tarifs</text:span></text:a>,<text:s/><text:a xlink:href="https://www.billabex.com/en/terms-and-conditions-of-use/" office:target-frame-name="_top" xlink:show="replace"><text:span text:style-name="Lienhypertexte">conditions tarifaires</text:span></text:a></text:p>
      <text:p text:style-name="Normal"><text:span text:style-name="T40">Forces visibles.</text:span></text:p>
      <text:list text:style-name="LFO7" text:continue-numbering="true">
        <text:list-item>
          <text:p text:style-name="P41">Proposition très nette : réduire fortement le travail manuel de relance sans déshumaniser la relation.</text:p>
        </text:list-item>
        <text:list-item>
          <text:p text:style-name="P42">IA conversationnelle et multicanale : e-mail, SMS, courrier, voix, avec prise en compte des promesses de paiement et litiges.</text:p>
        </text:list-item>
        <text:list-item>
          <text:p text:style-name="P43">Interopérabilité affichée avec Pennylane, Sage, Odoo, Zoho, NetSuite, Chargebee et Sellsy, complétée par API/connecteurs.<text:s/><text:a xlink:href="https://www.billabex.com/en/" office:target-frame-name="_top" xlink:show="replace"><text:span text:style-name="Lienhypertexte">Intégrations Billabex</text:span></text:a></text:p>
        </text:list-item>
      </text:list>
      <text:p text:style-name="Normal"><text:span text:style-name="T44">Faiblesses / axes d’amélioration perçus.</text:span></text:p>
      <text:list text:style-name="LFO8" text:continue-numbering="true">
        <text:list-item>
          <text:p text:style-name="P45">Faible preuve sociale indépendante : G2 affiche seulement deux avis ; c’est insuffisant pour conclure solidement sur la maturité produit ou la qualité de service.<text:s/><text:a xlink:href="https://www.g2.com/fr/products/billabex/reviews" office:target-frame-name="_top" xlink:show="replace"><text:span text:style-name="Lienhypertexte">Avis Billabex sur G2</text:span></text:a></text:p>
        </text:list-item>
        <text:list-item>
          <text:p text:style-name="P46">Prix non transparents, avec une métrique « débiteur actif » qui peut rendre le coût difficile à anticiper.</text:p>
        </text:list-item>
        <text:list-item>
          <text:p text:style-name="P47">Périmètre volontairement étroit : pas une suite de facturation/comptabilité ; la valeur dépend donc de la qualité des connecteurs et des données clients.</text:p>
        </text:list-item>
      </text:list>
      <table:table table:style-name="Table48">
        <table:table-columns>
          <table:table-column table:style-name="TableColumn49"/>
          <table:table-column table:style-name="TableColumn50"/>
          <table:table-column table:style-name="TableColumn51"/>
          <table:table-column table:style-name="TableColumn52"/>
          <table:table-column table:style-name="TableColumn53"/>
        </table:table-columns>
        <table:table-header-rows>
          <table:table-row table:style-name="TableRow54">
            <table:table-cell table:style-name="TableCell55">
              <text:p text:style-name="P56">Entreprise</text:p>
            </table:table-cell>
            <table:table-cell table:style-name="TableCell57">
              <text:p text:style-name="P58">Positionnement dominant</text:p>
            </table:table-cell>
            <table:table-cell table:style-name="TableCell59">
              <text:p text:style-name="P60">Prix public</text:p>
            </table:table-cell>
            <table:table-cell table:style-name="TableCell61">
              <text:p text:style-name="P62">Atout principal</text:p>
            </table:table-cell>
            <table:table-cell table:style-name="TableCell63">
              <text:p text:style-name="P64">Angle faible</text:p>
            </table:table-cell>
          </table:table-row>
        </table:table-header-rows>
        <table:table-row table:style-name="TableRow65">
          <table:table-cell table:style-name="TableCell66">
            <text:p text:style-name="Normal">Pennylane</text:p>
          </table:table-cell>
          <table:table-cell table:style-name="TableCell67">
            <text:p text:style-name="Normal">Suite finance/compta + facturation</text:p>
          </table:table-cell>
          <table:table-cell table:style-name="TableCell68">
            <text:p text:style-name="Normal">14–79 €/mois ; 49–298 € pour équipes</text:p>
          </table:table-cell>
          <table:table-cell table:style-name="TableCell69">
            <text:p text:style-name="Normal">Intégration complète et canal experts-comptables</text:p>
          </table:table-cell>
          <table:table-cell table:style-name="TableCell70">
            <text:p text:style-name="Normal">Recouvrement non spécialisé, produit potentiellement lourd</text:p>
          </table:table-cell>
        </table:table-row>
        <table:table-row table:style-name="TableRow71">
          <table:table-cell table:style-name="TableCell72">
            <text:p text:style-name="Normal">Cegid</text:p>
          </table:table-cell>
          <table:table-cell table:style-name="TableCell73">
            <text:p text:style-name="Normal">ERP/gestion/comptabilité, de TPE à PME complexe</text:p>
          </table:table-cell>
          <table:table-cell table:style-name="TableCell74">
            <text:p text:style-name="Normal">4–53,95 €/mois en Belgique ; souvent devis en France</text:p>
          </table:table-cell>
          <table:table-cell table:style-name="TableCell75">
            <text:p text:style-name="Normal">Couverture métier, conformité et robustesse</text:p>
          </table:table-cell>
          <table:table-cell table:style-name="TableCell76">
            <text:p text:style-name="Normal">Complexité, UX/support perçus, prix moins lisibles</text:p>
          </table:table-cell>
        </table:table-row>
        <table:table-row table:style-name="TableRow77">
          <table:table-cell table:style-name="TableCell78">
            <text:p text:style-name="Normal">Upflow</text:p>
          </table:table-cell>
          <table:table-cell table:style-name="TableCell79">
            <text:p text:style-name="Normal">AR automation pour équipes finance B2B</text:p>
          </table:table-cell>
          <table:table-cell table:style-name="TableCell80">
            <text:p text:style-name="Normal">Gratuit analytique ; payant sur devis</text:p>
          </table:table-cell>
          <table:table-cell table:style-name="TableCell81">
            <text:p text:style-name="Normal">Profondeur de pilotage du poste client</text:p>
          </table:table-cell>
          <table:table-cell table:style-name="TableCell82">
            <text:p text:style-name="Normal">Moins naturel pour petites TPE, prix opaque</text:p>
          </table:table-cell>
        </table:table-row>
        <table:table-row table:style-name="TableRow83">
          <table:table-cell table:style-name="TableCell84">
            <text:p text:style-name="Normal">Billabex</text:p>
          </table:table-cell>
          <table:table-cell table:style-name="TableCell85">
            <text:p text:style-name="Normal">Agent IA de relance/recouvrement connecté</text:p>
          </table:table-cell>
          <table:table-cell table:style-name="TableCell86">
            <text:p text:style-name="Normal">Sur devis, par débiteur actif</text:p>
          </table:table-cell>
          <table:table-cell table:style-name="TableCell87">
            <text:p text:style-name="Normal">Automatisation conversationnelle et multicanale</text:p>
          </table:table-cell>
          <table:table-cell table:style-name="TableCell88">
            <text:p text:style-name="Normal">Faible historique public, prix imprévisible</text:p>
          </table:table-cell>
        </table:table-row>
      </table:table>
      <text:p text:style-name="P89">Recommandation de positionnement</text:p>
      <text:p text:style-name="Normal">Le créneau le plus judicieux est :<text:s/><text:span text:style-name="T90">le copilote de recouvrement européen, simple et transparent, pour PME B2B de 10 à 200 salariés — connecté aux outils en place, sans remplacer leur comptabilité.</text:span></text:p>
      <text:p text:style-name="Normal">Concrètement :</text:p>
      <text:list text:style-name="LFO9" text:continue-numbering="true">
        <text:list-item>
          <text:p text:style-name="P91">Ne pas attaquer Pennylane/Cegid comme suite comptable : leur conformité, leurs intégrations et leurs canaux de distribution constituent une barrière élevée.</text:p>
        </text:list-item>
        <text:list-item>
          <text:p text:style-name="P92">Ne pas copier Upflow sur le segment scale-up/DAF sophistiqué : privilégier les PME qui ont un ERP, un logiciel de facturation ou un cabinet comptable, mais pas d’équipe crédit dédiée.</text:p>
        </text:list-item>
        <text:list-item>
          <text:p text:style-name="P93">Se différencier de Billabex par la<text:s/><text:span text:style-name="T94">confiance opérationnelle</text:span><text:s/>: règles d’approbation, mode humain-dans-la-boucle, gestion native des litiges/promesses de paiement, journal d’audit et reporting réellement personnalisable.</text:p>
        </text:list-item>
        <text:list-item>
          <text:p text:style-name="P95">Afficher un prix simple dès le départ — forfait par tranche de factures ou d’encours, sans surprise — et fournir un calculateur de ROI.</text:p>
        </text:list-item>
        <text:list-item>
          <text:p text:style-name="P96">Être « Europe native » : multilingue, multidevise, règles de relance par pays, et connecteurs avec les systèmes de facturation électronique/Peppol plutôt que chercher à devenir soi-même une suite réglementaire complète.</text:p>
        </text:list-item>
      </text:list>
      <text:p text:style-name="Normal">La promesse à viser :<text:s/><text:span text:style-name="T97">« Réduisez vos retards de paiement sans changer d’outil de facturation, sans abîmer la relation client et sans recruter une équipe de recouvrement. »</text:span></text:p>
      <text:p text:style-name="Normal"/>
      <text:p text:style-name="P98">TEST PROMPT LUNA MODE élevé</text:p>
      <text:p text:style-name="Normal"/>
      <text:p text:style-name="Normal">Analyse fondée sur les informations publiques vérifiées au 17 juillet 2026. Les offres ne sont pas parfaitement comparables : Pennylane et Cegid sont des suites de gestion, tandis qu’Upflow et Billabex sont des spécialistes du recouvrement connectés aux outils existants.</text:p>
      <text:p text:style-name="P99">Pennylane</text:p>
      <text:p text:style-name="Normal"><text:span text:style-name="T100">Positionnement principal</text:span><text:line-break/>Suite française de gestion financière pour dirigeants, TPE/PME et experts-comptables : facturation, achats, trésorerie, paiements et comptabilité. Les relances automatisées sont incluses à partir de l’offre Essentiel.<text:s/><text:a xlink:href="https://www.pennylane.com/fr/independants" office:target-frame-name="_top" xlink:show="replace"><text:span text:style-name="Lienhypertexte">Offres Pennylane</text:span></text:a><text:s/>·<text:s/><text:a xlink:href="https://help.pennylane.com/fr/articles/225076-questions-frequentes-sur-l-editeur-de-factures" office:target-frame-name="_top" xlink:show="replace"><text:span text:style-name="Lienhypertexte">Fonctionnalités de relance</text:span></text:a></text:p>
      <text:p text:style-name="Normal"><text:span text:style-name="T101">Prix publics</text:span></text:p>
      <text:list text:style-name="LFO10" text:continue-numbering="true">
        <text:list-item>
          <text:p text:style-name="P102">Indépendants : environ 14 €/mois HT (Basique), 24 € (Essentiel), 79 € (Premium + comptabilité).</text:p>
        </text:list-item>
        <text:list-item>
          <text:p text:style-name="P103">Équipes de 6 à 15 salariés : 49 €, 99 € et 298 € HT/mois selon le niveau d’offre.</text:p>
        </text:list-item>
        <text:list-item>
          <text:p text:style-name="P104">Offre personnalisée pour besoins plus complexes.<text:s/><text:a xlink:href="https://www.pennylane.com/fr/tarifs/medium" office:target-frame-name="_top" xlink:show="replace"><text:span text:style-name="Lienhypertexte">Tarifs Pennylane</text:span></text:a></text:p>
        </text:list-item>
      </text:list>
      <text:p text:style-name="Normal"><text:span text:style-name="T105">Forces visibles</text:span></text:p>
      <text:list text:style-name="LFO11" text:continue-numbering="true">
        <text:list-item>
          <text:p text:style-name="P106">Très forte intégration entre facturation, banque, dépenses, trésorerie et comptabilité.</text:p>
        </text:list-item>
        <text:list-item>
          <text:p text:style-name="P107">Facturation électronique et conformité intégrées aux abonnements.</text:p>
        </text:list-item>
        <text:list-item>
          <text:p text:style-name="P108">UX moderne, application mobile et distribution efficace via les cabinets comptables.</text:p>
        </text:list-item>
      </text:list>
      <text:p text:style-name="Normal"><text:span text:style-name="T109">Faiblesses ou axes d’amélioration perçus</text:span></text:p>
      <text:list text:style-name="LFO12" text:continue-numbering="true">
        <text:list-item>
          <text:p text:style-name="P110">Solution potentiellement trop large pour une TPE qui veut seulement facturer et récupérer ses impayés.</text:p>
        </text:list-item>
        <text:list-item>
          <text:p text:style-name="P111">Le recouvrement n’est pas le cœur de produit : gestion des litiges, promesses de paiement et scénarios avancés moins spécialisés qu’un outil AR dédié.</text:p>
        </text:list-item>
        <text:list-item>
          <text:p text:style-name="P112">Des avis signalent ponctuellement bugs, problèmes d’intégration ou délais de support, malgré une note globale favorable.<text:s/><text:a xlink:href="https://fr.trustpilot.com/review/pennylane.com" office:target-frame-name="_top" xlink:show="replace"><text:span text:style-name="Lienhypertexte">Avis Pennylane</text:span></text:a></text:p>
        </text:list-item>
      </text:list>
      <text:p text:style-name="P113"/>
      <text:p text:style-name="P114"/>
      <text:soft-page-break/>
      <text:p text:style-name="P115">Cegid</text:p>
      <text:p text:style-name="Normal"><text:span text:style-name="T116">Positionnement principal</text:span><text:line-break/>Éditeur historique de logiciels de gestion, de comptabilité et d’ERP, couvrant la simple facturation jusqu’aux organisations multi-entités et aux besoins sectoriels complexes. Cegid Invoice &amp; Financing cible notamment les TPE belges autour de Peppol, de la facturation électronique et du suivi de trésorerie.<text:s/><text:a xlink:href="https://go.cegid.com/logiciel-gestion.html" office:target-frame-name="_top" xlink:show="replace"><text:span text:style-name="Lienhypertexte">Solutions Cegid PME</text:span></text:a><text:s/>·<text:s/><text:a xlink:href="https://www.cegid.com/fr/produits/cegid-invoice-financing/" office:target-frame-name="_top" xlink:show="replace"><text:span text:style-name="Lienhypertexte">Cegid Invoice &amp; Financing</text:span></text:a></text:p>
      <text:p text:style-name="Normal"><text:span text:style-name="T117">Prix publics</text:span></text:p>
      <text:list text:style-name="LFO13" text:continue-numbering="true">
        <text:list-item>
          <text:p text:style-name="P118">Cegid Invoice &amp; Financing Belgique : de 4 € à 53,95 € HT/mois selon le plan.</text:p>
        </text:list-item>
        <text:list-item>
          <text:p text:style-name="P119">En France, les offres avancées Cegid Business/Quadra sont souvent sur devis.</text:p>
        </text:list-item>
        <text:list-item>
          <text:p text:style-name="P120">Des offres de facturation électronique TPE sont annoncées autour de 3 €/mois par des comparateurs spécialisés ; ce montant doit être confirmé commercialement.<text:s/><text:a xlink:href="https://www.cegid.com/fr/produits/cegid-invoice-financing/" office:target-frame-name="_top" xlink:show="replace"><text:span text:style-name="Lienhypertexte">Détail officiel des offres belges</text:span></text:a><text:s/>·<text:s/><text:a xlink:href="https://www.infos-pa.com/plateformes/cegid/tarifs" office:target-frame-name="_top" xlink:show="replace"><text:span text:style-name="Lienhypertexte">Repères de prix France</text:span></text:a></text:p>
        </text:list-item>
      </text:list>
      <text:p text:style-name="Normal"><text:span text:style-name="T121">Forces visibles</text:span></text:p>
      <text:list text:style-name="LFO14" text:continue-numbering="true">
        <text:list-item>
          <text:p text:style-name="P122">Couverture fonctionnelle et sectorielle très large : comptabilité, paie, CRM, stocks, production et gestion commerciale.</text:p>
        </text:list-item>
        <text:list-item>
          <text:p text:style-name="P123">Forte crédibilité réglementaire et capacité à accompagner des PME structurées.</text:p>
        </text:list-item>
        <text:list-item>
          <text:p text:style-name="P124">Réseau historique auprès des experts-comptables et entreprises établies.</text:p>
        </text:list-item>
      </text:list>
      <text:p text:style-name="Normal"><text:span text:style-name="T125">Faiblesses ou axes d’amélioration perçus</text:span></text:p>
      <text:list text:style-name="LFO15" text:continue-numbering="true">
        <text:list-item>
          <text:p text:style-name="P126">Complexité, paramétrage et coût potentiellement disproportionnés pour une petite structure.</text:p>
        </text:list-item>
        <text:list-item>
          <text:p text:style-name="P127">Tarification française avancée peu lisible avant échange commercial.</text:p>
        </text:list-item>
        <text:list-item>
          <text:p text:style-name="P128">Les avis publics mentionnent régulièrement des problèmes de support, de bugs ou d’ergonomie ; ces retours concernent plusieurs produits Cegid et ne doivent pas être généralisés à chaque module.<text:s/><text:a xlink:href="https://fr.trustpilot.com/review/cegid.com" office:target-frame-name="_top" xlink:show="replace"><text:span text:style-name="Lienhypertexte">Avis Cegid</text:span></text:a></text:p>
        </text:list-item>
      </text:list>
      <text:p text:style-name="P129">Upflow</text:p>
      <text:p text:style-name="Normal"><text:span text:style-name="T130">Positionnement principal</text:span><text:line-break/>Plateforme d’Accounts Receivable automation et de « Financial Relationship Management » : visibilité sur les créances, priorisation, campagnes de relance personnalisées et collaboration entre finance, ventes et service client. Les paliers sont conçus pour des start-ups et scale-ups, jusqu’aux entreprises dépassant 50 M$ d’ARR.<text:s/><text:a xlink:href="https://upflow.io/pricing" office:target-frame-name="_top" xlink:show="replace"><text:span text:style-name="Lienhypertexte">Tarifs et segmentation Upflow</text:span></text:a></text:p>
      <text:p text:style-name="Normal"><text:span text:style-name="T131">Prix publics</text:span></text:p>
      <text:list text:style-name="LFO16" text:continue-numbering="true">
        <text:list-item>
          <text:p text:style-name="P132">Offre Discover : gratuite, principalement orientée analyse et benchmark.</text:p>
        </text:list-item>
        <text:list-item>
          <text:p text:style-name="P133">Offres Grow, Scale et Strategic : sur devis, sans prix public.</text:p>
        </text:list-item>
      </text:list>
      <text:p text:style-name="Normal"><text:span text:style-name="T134">Forces visibles</text:span></text:p>
      <text:list text:style-name="LFO17" text:continue-numbering="true">
        <text:list-item>
          <text:p text:style-name="P135">Produit spécialisé sur le poste client, avec workflows, segmentation et historique des interactions.</text:p>
        </text:list-item>
        <text:list-item>
          <text:p text:style-name="P136">Bonne réputation d’ergonomie et d’automatisation : 4,8/5 sur 231 avis G2.</text:p>
        </text:list-item>
        <text:list-item>
          <text:p text:style-name="P137">Positionnement pertinent pour les entreprises ayant déjà un ERP ou logiciel de facturation.<text:s/><text:a xlink:href="https://www.g2.com/products/upflow-upflow/reviews" office:target-frame-name="_top" xlink:show="replace"><text:span text:style-name="Lienhypertexte">Avis Upflow sur G2</text:span></text:a></text:p>
        </text:list-item>
      </text:list>
      <text:p text:style-name="Normal"><text:span text:style-name="T138">Faiblesses ou axes d’amélioration perçus</text:span></text:p>
      <text:list text:style-name="LFO18" text:continue-numbering="true">
        <text:list-item>
          <text:p text:style-name="P139">Discours et segmentation plutôt orientés start-up/scale-up et équipes finance, moins vers la micro-TPE.</text:p>
        </text:list-item>
        <text:list-item>
          <text:p text:style-name="P140">Prix payants non transparents.</text:p>
        </text:list-item>
        <text:list-item>
          <text:p text:style-name="P141">Des utilisateurs demandent plus de souplesse sur les rapports, filtres, modèles d’e-mails et certaines intégrations.<text:s/><text:a xlink:href="https://www.g2.com/products/upflow-upflow/reviews" office:target-frame-name="_top" xlink:show="replace"><text:span text:style-name="Lienhypertexte">Avis Upflow sur G2</text:span></text:a></text:p>
        </text:list-item>
      </text:list>
      <text:p text:style-name="P142">Billabex</text:p>
      <text:p text:style-name="Normal"><text:span text:style-name="T143">Positionnement principal</text:span><text:line-break/>Agent IA de recouvrement amiable B2B : détection des retards, relances multicanales, compréhension des réponses clients, suivi des promesses de paiement et intervention humaine uniquement lorsque nécessaire.<text:s/><text:a xlink:href="https://www.billabex.com/fr/" office:target-frame-name="_top" xlink:show="replace"><text:span text:style-name="Lienhypertexte">Billabex — présentation</text:span></text:a><text:s/>·<text:s/><text:a xlink:href="https://www.billabex.com/fr/pourquoi-billabex/" office:target-frame-name="_top" xlink:show="replace"><text:span text:style-name="Lienhypertexte">Fonctionnement de l’agent</text:span></text:a></text:p>
      <text:p text:style-name="Normal"><text:span text:style-name="T144">Prix publics</text:span></text:p>
      <text:list text:style-name="LFO19" text:continue-numbering="true">
        <text:list-item>
          <text:p text:style-name="P145">Aucun montant public.</text:p>
        </text:list-item>
        <text:list-item>
          <text:p text:style-name="P146">Offre sur devis, avec une facturation mensuelle calculée selon le nombre de « débiteurs actifs ».<text:s/><text:a xlink:href="https://www.billabex.com/en/pricing/" office:target-frame-name="_top" xlink:show="replace"><text:span text:style-name="Lienhypertexte">Tarifs Billabex</text:span></text:a><text:s/>·<text:s/><text:a xlink:href="https://www.billabex.com/en/terms-and-conditions-of-use/" office:target-frame-name="_top" xlink:show="replace"><text:span text:style-name="Lienhypertexte">Conditions tarifaires</text:span></text:a></text:p>
        </text:list-item>
      </text:list>
      <text:p text:style-name="Normal"><text:span text:style-name="T147">Forces visibles</text:span></text:p>
      <text:list text:style-name="LFO20" text:continue-numbering="true">
        <text:list-item>
          <text:p text:style-name="P148">Promesse très claire : automatiser le recouvrement sans dégrader la relation client.</text:p>
        </text:list-item>
        <text:list-item>
          <text:p text:style-name="P149">Approche conversationnelle et multicanale : e-mail, SMS, courrier, voix.</text:p>
        </text:list-item>
        <text:list-item>
          <text:p text:style-name="P150">Intégrations annoncées avec Pennylane, Sage, Odoo, Zoho, NetSuite, Chargebee et Sellsy, ainsi qu’une API.<text:s/><text:a xlink:href="https://www.billabex.com/en/" office:target-frame-name="_top" xlink:show="replace"><text:span text:style-name="Lienhypertexte">Intégrations Billabex</text:span></text:a></text:p>
        </text:list-item>
      </text:list>
      <text:p text:style-name="Normal"><text:span text:style-name="T151">Faiblesses ou axes d’amélioration perçus</text:span></text:p>
      <text:list text:style-name="LFO21" text:continue-numbering="true">
        <text:list-item>
          <text:p text:style-name="P152">Preuve sociale indépendante encore limitée : seulement deux avis G2, donc faible recul public.<text:s/><text:a xlink:href="https://www.g2.com/fr/products/billabex/reviews" office:target-frame-name="_top" xlink:show="replace"><text:span text:style-name="Lienhypertexte">Avis Billabex sur G2</text:span></text:a></text:p>
        </text:list-item>
        <text:list-item>
          <text:p text:style-name="P153">Prix difficile à anticiper avec une métrique basée sur les débiteurs actifs.</text:p>
        </text:list-item>
        <text:list-item>
          <text:p text:style-name="P154">Périmètre étroit : ce n’est pas une solution complète de facturation, comptabilité ou trésorerie ; la valeur dépend fortement des intégrations.</text:p>
        </text:list-item>
      </text:list>
      <text:p text:style-name="P155">Tableau comparatif</text:p>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s>
        <table:table-header-rows>
          <table:table-row table:style-name="TableRow162">
            <table:table-cell table:style-name="TableCell163">
              <text:p text:style-name="P164">Entreprise</text:p>
            </table:table-cell>
            <table:table-cell table:style-name="TableCell165">
              <text:p text:style-name="P166">Positionnement</text:p>
            </table:table-cell>
            <table:table-cell table:style-name="TableCell167">
              <text:p text:style-name="P168">Prix public indicatif</text:p>
            </table:table-cell>
            <table:table-cell table:style-name="TableCell169">
              <text:p text:style-name="P170">Forces principales</text:p>
            </table:table-cell>
            <table:table-cell table:style-name="TableCell171">
              <text:p text:style-name="P172">Faiblesses perçues</text:p>
            </table:table-cell>
          </table:table-row>
        </table:table-header-rows>
        <table:table-row table:style-name="TableRow173">
          <table:table-cell table:style-name="TableCell174">
            <text:p text:style-name="Normal">Pennylane</text:p>
          </table:table-cell>
          <table:table-cell table:style-name="TableCell175">
            <text:p text:style-name="Normal">Suite finance/comptabilité avec facturation</text:p>
          </table:table-cell>
          <table:table-cell table:style-name="TableCell176">
            <text:p text:style-name="Normal">14–79 €/mois ; jusqu’à 298 € pour équipes</text:p>
          </table:table-cell>
          <table:table-cell table:style-name="TableCell177">
            <text:p text:style-name="Normal">Intégration, conformité, UX, réseau comptable</text:p>
          </table:table-cell>
          <table:table-cell table:style-name="TableCell178">
            <text:p text:style-name="Normal">Recouvrement moins spécialisé, solution parfois large</text:p>
          </table:table-cell>
        </table:table-row>
        <table:table-row table:style-name="TableRow179">
          <table:table-cell table:style-name="TableCell180">
            <text:p text:style-name="Normal">Cegid</text:p>
          </table:table-cell>
          <table:table-cell table:style-name="TableCell181">
            <text:p text:style-name="Normal">Gestion/ERP de la TPE à la PME complexe</text:p>
          </table:table-cell>
          <table:table-cell table:style-name="TableCell182">
            <text:p text:style-name="Normal">4–53,95 €/mois en Belgique ; souvent sur devis en France</text:p>
          </table:table-cell>
          <table:table-cell table:style-name="TableCell183">
            <text:p text:style-name="Normal">Couverture métier, robustesse, conformité</text:p>
          </table:table-cell>
          <table:table-cell table:style-name="TableCell184">
            <text:p text:style-name="Normal">Complexité, prix opaques, support/UX critiqués</text:p>
          </table:table-cell>
        </table:table-row>
        <text:soft-page-break/>
        <table:table-row table:style-name="TableRow185">
          <table:table-cell table:style-name="TableCell186">
            <text:p text:style-name="Normal">Upflow</text:p>
          </table:table-cell>
          <table:table-cell table:style-name="TableCell187">
            <text:p text:style-name="Normal">AR automation pour équipes finance B2B</text:p>
          </table:table-cell>
          <table:table-cell table:style-name="TableCell188">
            <text:p text:style-name="Normal">Analyse gratuite ; automatisation sur devis</text:p>
          </table:table-cell>
          <table:table-cell table:style-name="TableCell189">
            <text:p text:style-name="Normal">Profondeur AR, workflows, reporting, collaboration</text:p>
          </table:table-cell>
          <table:table-cell table:style-name="TableCell190">
            <text:p text:style-name="Normal">Moins adapté aux très petites structures, prix opaque</text:p>
          </table:table-cell>
        </table:table-row>
        <table:table-row table:style-name="TableRow191">
          <table:table-cell table:style-name="TableCell192">
            <text:p text:style-name="Normal">Billabex</text:p>
          </table:table-cell>
          <table:table-cell table:style-name="TableCell193">
            <text:p text:style-name="Normal">Agent IA autonome de recouvrement</text:p>
          </table:table-cell>
          <table:table-cell table:style-name="TableCell194">
            <text:p text:style-name="Normal">Sur devis, par débiteur actif</text:p>
          </table:table-cell>
          <table:table-cell table:style-name="TableCell195">
            <text:p text:style-name="Normal">Automatisation conversationnelle, multicanal, intégrations</text:p>
          </table:table-cell>
          <table:table-cell table:style-name="TableCell196">
            <text:p text:style-name="Normal">Maturité/preuves publiques limitées, coût imprévisible</text:p>
          </table:table-cell>
        </table:table-row>
      </table:table>
      <text:p text:style-name="P197">Recommandation de positionnement</text:p>
      <text:p text:style-name="Normal">Le créneau le plus défendable serait :</text:p>
      <text:p text:style-name="Normal"><text:span text:style-name="T198">un copilote européen du recouvrement pour PME B2B de 10 à 200 salariés, connecté aux outils existants, avec prix transparents et contrôle humain.</text:span></text:p>
      <text:p text:style-name="Normal">Il faudrait :</text:p>
      <text:list text:style-name="LFO22" text:continue-numbering="true">
        <text:list-item>
          <text:p text:style-name="P199">éviter de concurrencer Pennylane et Cegid sur la comptabilité complète et l’ERP ;</text:p>
        </text:list-item>
        <text:list-item>
          <text:p text:style-name="P200">cibler les PME qui disposent déjà d’un logiciel de facturation mais n’ont pas d’équipe dédiée au recouvrement ;</text:p>
        </text:list-item>
        <text:list-item>
          <text:p text:style-name="P201">se différencier de Billabex par des garde-fous humains, une meilleure gestion des litiges et promesses de paiement, ainsi qu’un journal d’audit clair ;</text:p>
        </text:list-item>
        <text:list-item>
          <text:p text:style-name="P202">se différencier d’Upflow par une expérience plus simple, un prix affiché et une implantation européenne native ;</text:p>
        </text:list-item>
        <text:list-item>
          <text:p text:style-name="P203">proposer le multilingue, le multidevise, des règles de relance par pays et des connecteurs aux plateformes de facturation électronique.</text:p>
        </text:list-item>
      </text:list>
      <text:p text:style-name="Normal">Positionnement recommandé :<text:s/><text:span text:style-name="T204">« Réduisez vos retards de paiement sans changer de logiciel de facturation, sans abîmer la relation client et sans recruter une équipe de recouvrement. »</text:span></text:p>
      <text:p text:style-name="P205"/>
      <text:p text:style-name="P206"/>
      <text:p text:style-name="P207"/>
      <text:p text:style-name="P208"/>
      <text:p text:style-name="P209"/>
      <text:p text:style-name="Normal"/>
      <text:p text:style-name="Normal"/>
      <text:p text:style-name="P210">TEST PROMPT SOL MODE élevé</text:p>
      <text:p text:style-name="Normal"/>
      <text:p text:style-name="P211">Analyse concurrentielle — facturation et recouvrement automatisé</text:p>
      <text:p text:style-name="Normal"><text:span text:style-name="T212">Analyse mise à jour le 17 juillet 2026.</text:span></text:p>
      <text:soft-page-break/>
      <text:p text:style-name="Normal">Ces quatre acteurs ne sont pas totalement comparables :</text:p>
      <text:list text:style-name="LFO23" text:continue-numbering="true">
        <text:list-item>
          <text:p text:style-name="P213"><text:span text:style-name="T214">Pennylane et Cegid</text:span><text:s/>sont avant tout des plateformes de gestion financière, de facturation et de comptabilité.</text:p>
        </text:list-item>
        <text:list-item>
          <text:p text:style-name="P215"><text:span text:style-name="T216">Upflow et Billabex</text:span><text:s/>sont des spécialistes du poste client et du recouvrement B2B.</text:p>
        </text:list-item>
      </text:list>
      <text:p text:style-name="Normal">C’est précisément entre ces deux catégories qu’existe la meilleure opportunité de différenciation.</text:p>
      <text:p text:style-name="Normal"><draw:custom-shape svg:x="0in" svg:y="0in" svg:width="45.51042in" svg:height="0.00139in" draw:id="id0" draw:style-name="a0" draw:name="Horizontal Line 37" text:anchor-type="as-char"><svg:title/><svg:desc/><draw:enhanced-geometry draw:type="non-primitive" svg:viewBox="0 0 21600 21600" draw:enhanced-path="M 0 0 L 21600 0 21600 21600 0 21600 Z N"/></draw:custom-shape></text:p>
      <text:p text:style-name="P217">1. Pennylane</text:p>
      <text:p text:style-name="P218">Positionnement principal</text:p>
      <text:p text:style-name="Normal">Pennylane se positionne comme une<text:s/><text:span text:style-name="T219">plateforme financière et comptable tout-en-un</text:span><text:s/>pour les indépendants, TPE et PME. Elle centralise la facturation, les achats, les dépenses, la trésorerie, la comptabilité et la collaboration avec l’expert-comptable. Elle est également Plateforme Agréée pour la facturation électronique française. (<text:a office:title="Pennylane: Plateforme tout-en-un de gestion financière ..." xlink:href="https://www.pennylane.com/fr?utm_source=chatgpt.com" office:target-frame-name="_top" xlink:show="replace"><text:span text:style-name="Lienhypertexte">Gestion Financière &amp; Comptabilité</text:span></text:a>)</text:p>
      <text:p text:style-name="Normal">Le recouvrement est une fonctionnalité intégrée à la plateforme, mais ce n’est pas le cœur exclusif du produit.</text:p>
      <text:p text:style-name="P220">Prix publics</text:p>
      <text:p text:style-name="Normal">Les tarifs publiés pour les entreprises sont les suivants :</text:p>
      <text:list text:style-name="LFO24" text:continue-numbering="true">
        <text:list-item>
          <text:p text:style-name="P221">offre micro-entreprise :<text:s/><text:span text:style-name="T222">0 €</text:span><text:s/>;</text:p>
        </text:list-item>
        <text:list-item>
          <text:p text:style-name="P223">Starter pour indépendants :<text:s/><text:span text:style-name="T224">7 € HT/mois</text:span><text:s/>avec activation d’un compte professionnel ;</text:p>
        </text:list-item>
        <text:list-item>
          <text:p text:style-name="P225">Basique :<text:s/><text:span text:style-name="T226">14 € HT/mois</text:span><text:s/>;</text:p>
        </text:list-item>
        <text:list-item>
          <text:p text:style-name="P227">Essentiel :<text:s/><text:span text:style-name="T228">24 € HT/mois</text:span><text:s/>;</text:p>
        </text:list-item>
        <text:list-item>
          <text:p text:style-name="P229">Premium avec module comptable :<text:s/><text:span text:style-name="T230">79 € HT/mois</text:span>.</text:p>
        </text:list-item>
      </text:list>
      <text:p text:style-name="Normal">Les scénarios de relances automatisées apparaissent à partir de l’offre<text:s/><text:span text:style-name="T231">Essentiel à 24 € HT/mois</text:span>. (<text:a office:title="Tarifs | Pennylane" xlink:href="https://www.pennylane.com/fr/tarifs" office:target-frame-name="_top" xlink:show="replace"><text:span text:style-name="Lienhypertexte">Gestion Financière &amp; Comptabilité</text:span></text:a>)</text:p>
      <text:p text:style-name="P232">Forces les plus visibles</text:p>
      <text:p text:style-name="Normal"><text:span text:style-name="T233">1. Couverture fonctionnelle très large</text:span></text:p>
      <text:p text:style-name="Normal">Pennylane permet de gérer les factures clients et fournisseurs, les paiements, la trésorerie, les notes de frais, le compte professionnel et la production comptable depuis un même environnement. (<text:a office:title="Tarifs | Pennylane" xlink:href="https://www.pennylane.com/fr/tarifs" office:target-frame-name="_top" xlink:show="replace"><text:span text:style-name="Lienhypertexte">Gestion Financière &amp; Comptabilité</text:span></text:a>)</text:p>
      <text:p text:style-name="Normal"><text:span text:style-name="T234">2. Collaboration forte avec les experts-comptables</text:span></text:p>
      <text:p text:style-name="Normal">La plateforme a été conçue pour connecter le dirigeant, les équipes financières et le cabinet comptable. Cela crée un effet de réseau et rend le changement d’outil plus difficile une fois que l’entreprise et son comptable l’utilisent ensemble. (<text:a office:title="Les 12 meilleurs logiciels de comptabilité en ligne en 2026" xlink:href="https://www.appvizer.fr/magazine/finance-comptabilite/comptabilite/logiciel-comptabilite-en-ligne?utm_source=chatgpt.com" office:target-frame-name="_top" xlink:show="replace"><text:span text:style-name="Lienhypertexte">Appvizer</text:span></text:a>)</text:p>
      <text:p text:style-name="Normal"><text:span text:style-name="T235">3. Tarification accessible et relativement transparente</text:span></text:p>
      <text:p text:style-name="Normal">L’entrée de gamme est nettement moins chère que celle des logiciels spécialisés de recouvrement. La présence d’une offre gratuite pour les micro-entreprises constitue un levier d’acquisition puissant<text:s/><text:soft-page-break/>avant l’entrée en vigueur complète de la facturation électronique. (<text:a office:title="Tarifs | Pennylane" xlink:href="https://www.pennylane.com/fr/tarifs" office:target-frame-name="_top" xlink:show="replace"><text:span text:style-name="Lienhypertexte">Gestion Financière &amp; Comptabilité</text:span></text:a>)</text:p>
      <text:p text:style-name="P236">Faiblesses ou axes d’amélioration perçus</text:p>
      <text:p text:style-name="Normal"><text:span text:style-name="T237">1. Recouvrement moins profond que celui d’un spécialiste</text:span></text:p>
      <text:p text:style-name="Normal">Pennylane permet de créer des scénarios de relance, mais ne se présente pas comme une plateforme complète de gestion des promesses de paiement, des litiges, des conversations débiteurs ou des stratégies de recouvrement complexes. Le système ressemble davantage à un workflow automatisé intégré à la comptabilité qu’à un véritable agent de recouvrement. (<text:a office:title="Tarifs | Pennylane" xlink:href="https://www.pennylane.com/fr/tarifs/large" office:target-frame-name="_top" xlink:show="replace"><text:span text:style-name="Lienhypertexte">Gestion Financière &amp; Comptabilité</text:span></text:a>)</text:p>
      <text:p text:style-name="Normal"><text:span text:style-name="T238">2. Certaines limites fonctionnelles pour les entreprises internationales</text:span></text:p>
      <text:p text:style-name="Normal">Des utilisateurs citent notamment une gestion multidevise encore perfectible et un prix pouvant devenir élevé lorsque les besoins comptables et financiers augmentent. (<text:a office:title="Pennylane - Avis, notes, prix et abonnements" xlink:href="https://www.capterra.fr/software/218672/pennylane?utm_source=chatgpt.com" office:target-frame-name="_top" xlink:show="replace"><text:span text:style-name="Lienhypertexte">Capterra</text:span></text:a>)</text:p>
      <text:p text:style-name="Normal"><text:span text:style-name="T239">3. Dépendance aux intégrations bancaires et applicatives</text:span></text:p>
      <text:p text:style-name="Normal">La majorité des retours est positive, mais certains avis font état de problèmes de connexion récurrents, d’intégrations comme GoCardless ou de parcours de support parfois frustrants. Il s’agit de retours minoritaires, à mettre en perspective avec une note Trustpilot de 4,5/5 au moment de la vérification. (<text:a office:title="Read Customer Service Reviews of pennylane.com" xlink:href="https://uk.trustpilot.com/review/pennylane.com?utm_source=chatgpt.com" office:target-frame-name="_top" xlink:show="replace"><text:span text:style-name="Lienhypertexte">Trustpilot</text:span></text:a>)</text:p>
      <text:p text:style-name="Normal"><draw:custom-shape svg:x="0in" svg:y="0in" svg:width="45.51042in" svg:height="0.00139in" draw:id="id1" draw:style-name="a1" draw:name="Horizontal Line 38" text:anchor-type="as-char"><svg:title/><svg:desc/><draw:enhanced-geometry draw:type="non-primitive" svg:viewBox="0 0 21600 21600" draw:enhanced-path="M 0 0 L 21600 0 21600 21600 0 21600 Z N"/></draw:custom-shape></text:p>
      <text:p text:style-name="P240">2. Cegid</text:p>
      <text:p text:style-name="P241">Positionnement principal</text:p>
      <text:p text:style-name="Normal">Cegid est un<text:s/><text:span text:style-name="T242">éditeur historique de logiciels de gestion</text:span>, avec une offre très large couvrant facturation, comptabilité, gestion commerciale, stocks, trésorerie, fiscalité, ressources humaines et ERP.</text:p>
      <text:p text:style-name="Normal">Pour les TPE, Cegid Business permet notamment de créer des devis et factures, suivre les échéances, relancer les clients, payer les fournisseurs, gérer les stocks et collaborer avec l’expert-comptable. Cegid annonce 450 000 entrepreneurs et petites entreprises utilisatrices de cet environnement. (<text:a office:title="Cegid Business | Logiciel de facturation et gestion des stocks TPE" xlink:href="https://www.cegid.com/fr/produits/cegid-business/" office:target-frame-name="_top" xlink:show="replace"><text:span text:style-name="Lienhypertexte">Cegid Italy</text:span></text:a>)</text:p>
      <text:p text:style-name="P243">Prix publics</text:p>
      <text:p text:style-name="Normal">Cegid ne présente pas clairement les prix de Cegid Business sur sa page produit actuelle.</text:p>
      <text:p text:style-name="Normal">Des comparateurs indépendants indiquent néanmoins approximativement :</text:p>
      <text:list text:style-name="LFO25" text:continue-numbering="true">
        <text:list-item>
          <text:p text:style-name="P244">Factures et Devis :<text:s/><text:span text:style-name="T245">16,95 € HT/mois</text:span><text:s/>;</text:p>
        </text:list-item>
        <text:list-item>
          <text:p text:style-name="P246">Gestion commerciale Services :<text:s/><text:span text:style-name="T247">29,95 € HT/mois</text:span><text:s/>;</text:p>
        </text:list-item>
        <text:list-item>
          <text:p text:style-name="P248">Gestion commerciale Négoce :<text:s/><text:span text:style-name="T249">44,95 € HT/mois</text:span>.</text:p>
        </text:list-item>
      </text:list>
      <text:p text:style-name="Normal">Ces montants doivent être confirmés auprès de Cegid, particulièrement pour les modules, services financiers, options de paiement et solutions destinées aux structures plus importantes. (<text:a office:title="Notre avis sur Cegid - Analyse et Test Complet (MAJ 2026)" xlink:href="https://tool-advisor.fr/logiciel-comptabilite/comparatif/cegid/?utm_source=chatgpt.com" office:target-frame-name="_top" xlink:show="replace"><text:span text:style-name="Lienhypertexte">Tool Advisor</text:span></text:a>)</text:p>
      <text:p text:style-name="P250">Forces les plus visibles</text:p>
      <text:p text:style-name="Normal"><text:span text:style-name="T251">1. Profondeur fonctionnelle et expertise réglementaire</text:span></text:p>
      <text:soft-page-break/>
      <text:p text:style-name="Normal">Cegid couvre une grande partie des besoins administratifs, comptables et commerciaux d’une entreprise. Sa Plateforme Agréée est intégrée à ses logiciels et couvre la conformité à la réforme de la facturation électronique. (<text:a office:title="Cegid Business | Logiciel de facturation et gestion des stocks TPE" xlink:href="https://www.cegid.com/fr/produits/cegid-business/" office:target-frame-name="_top" xlink:show="replace"><text:span text:style-name="Lienhypertexte">Cegid Italy</text:span></text:a>)</text:p>
      <text:p text:style-name="Normal"><text:span text:style-name="T252">2. Écosystème installé et relation avec les experts-comptables</text:span></text:p>
      <text:p text:style-name="Normal">Cegid dispose d’un historique important auprès des cabinets comptables et des PME. Une entreprise déjà équipée d’une solution Cegid aura naturellement intérêt à rester dans cet environnement pour la facture électronique et la gestion financière. (<text:a office:title="Cegid Business | Logiciel de facturation et gestion des stocks TPE" xlink:href="https://www.cegid.com/fr/produits/cegid-business/" office:target-frame-name="_top" xlink:show="replace"><text:span text:style-name="Lienhypertexte">Cegid Italy</text:span></text:a>)</text:p>
      <text:p text:style-name="Normal"><text:span text:style-name="T253">3. Offre adaptée à plusieurs niveaux de maturité</text:span></text:p>
      <text:p text:style-name="Normal">Cegid peut accompagner une petite entreprise qui émet simplement des devis jusqu’à une organisation ayant des besoins en stocks, commandes, trésorerie, fiscalité ou ERP. (<text:a office:title="Cegid Business | Logiciel de facturation et gestion des stocks TPE" xlink:href="https://www.cegid.com/fr/produits/cegid-business/" office:target-frame-name="_top" xlink:show="replace"><text:span text:style-name="Lienhypertexte">Cegid Italy</text:span></text:a>)</text:p>
      <text:p text:style-name="P254">Faiblesses ou axes d’amélioration perçus</text:p>
      <text:p text:style-name="Normal"><text:span text:style-name="T255">1. Complexité et expérience utilisateur moins moderne</text:span></text:p>
      <text:p text:style-name="Normal">La richesse fonctionnelle peut devenir un frein pour une petite entreprise. Des analyses indépendantes relèvent une interface parfois moins moderne et une prise en main nécessitant davantage d’accompagnement que les nouveaux SaaS. (<text:a office:title="Cegid XRP vs Sage 100 : quel ERP pour sa gestion d' ..." xlink:href="https://www.appvizer.fr/magazine/operations/erp/cegid-vs-sage?utm_source=chatgpt.com" office:target-frame-name="_top" xlink:show="replace"><text:span text:style-name="Lienhypertexte">Appvizer</text:span></text:a>)</text:p>
      <text:p text:style-name="Normal"><text:span text:style-name="T256">2. Offre et tarification difficiles à lire</text:span></text:p>
      <text:p text:style-name="Normal">Les besoins sont répartis entre plusieurs produits : Cegid Business, Cegid Invoice &amp; Financing, Plateforme Agréée, solutions comptables, trésorerie ou ERP. Cette richesse complique la compréhension du produit à acheter et du coût total. (<text:a office:title="Cegid Business | Logiciel de facturation et gestion des stocks TPE" xlink:href="https://www.cegid.com/fr/produits/cegid-business/" office:target-frame-name="_top" xlink:show="replace"><text:span text:style-name="Lienhypertexte">Cegid Italy</text:span></text:a>)</text:p>
      <text:p text:style-name="Normal"><text:span text:style-name="T257">3. Automatisation du recouvrement relativement limitée</text:span></text:p>
      <text:p text:style-name="Normal">Cegid Business alerte l’entreprise en cas de retard et lui permet de relancer directement le client. La documentation indique ensuite que l’utilisateur enregistre le règlement. Cela reste davantage une fonction de suivi de facturation qu’un système autonome de conversation, de négociation et de suivi des engagements du débiteur. (<text:a office:title="Cegid Business | Logiciel de facturation et gestion des stocks TPE" xlink:href="https://www.cegid.com/fr/produits/cegid-business/" office:target-frame-name="_top" xlink:show="replace"><text:span text:style-name="Lienhypertexte">Cegid Italy</text:span></text:a>)</text:p>
      <text:p text:style-name="Normal"><draw:custom-shape svg:x="0in" svg:y="0in" svg:width="45.51042in" svg:height="0.00139in" draw:id="id2" draw:style-name="a2" draw:name="Horizontal Line 39" text:anchor-type="as-char"><svg:title/><svg:desc/><draw:enhanced-geometry draw:type="non-primitive" svg:viewBox="0 0 21600 21600" draw:enhanced-path="M 0 0 L 21600 0 21600 21600 0 21600 Z N"/></draw:custom-shape></text:p>
      <text:p text:style-name="P258">3. Upflow</text:p>
      <text:p text:style-name="P259">Positionnement principal</text:p>
      <text:p text:style-name="Normal">Upflow se positionne comme une plateforme de<text:s/><text:span text:style-name="T260">Financial Relationship Management</text:span><text:s/>et d’automatisation des comptes clients pour les entreprises B2B.</text:p>
      <text:p text:style-name="Normal">Elle couvre les relances, la segmentation des clients, le rapprochement des paiements, les portails de paiement, les workflows collaboratifs et le pilotage du DSO. La cible affichée va des entreprises réalisant moins de 10 millions de dollars de revenus récurrents aux organisations dépassant 50 millions. (<text:a office:title="Pricing | Upflow" xlink:href="https://upflow.io/pricing" office:target-frame-name="_top" xlink:show="replace"><text:span text:style-name="Lienhypertexte">upflow.io</text:span></text:a>)</text:p>
      <text:p text:style-name="Normal">Upflow ne remplace généralement pas le logiciel de facturation ou l’ERP : il se connecte à NetSuite, QuickBooks, Xero, Stripe Billing, Chargebee et d’autres solutions.</text:p>
      <text:p text:style-name="P261">Prix publics</text:p>
      <text:p text:style-name="Normal">La page tarifaire officielle ne publie aucun montant et invite les prospects à contacter l’équipe commerciale.</text:p>
      <text:soft-page-break/>
      <text:p text:style-name="Normal">Capterra affiche néanmoins un prix de départ indicatif de<text:s/><text:span text:style-name="T262">440 dollars par mois</text:span>, avec essai disponible. Ce montant ne constitue pas nécessairement le tarif actuel proposé à chaque entreprise et doit être confirmé par devis. (<text:a office:title="Pricing | Upflow" xlink:href="https://upflow.io/pricing" office:target-frame-name="_top" xlink:show="replace"><text:span text:style-name="Lienhypertexte">upflow.io</text:span></text:a>)</text:p>
      <text:p text:style-name="P263">Forces les plus visibles</text:p>
      <text:p text:style-name="Normal"><text:span text:style-name="T264">1. Spécialisation complète sur le cycle invoice-to-cash</text:span></text:p>
      <text:p text:style-name="Normal">Upflow va plus loin que les simples emails automatiques : segmentation, relances multicanales, portail client, paiements, rapprochement automatique, DSO, CEI et balance âgée. (<text:a office:title="Accounts Receivable Automation Software for B2B Finance ..." xlink:href="https://upflow.io/accounts-receivable-automation-software?utm_source=chatgpt.com" office:target-frame-name="_top" xlink:show="replace"><text:span text:style-name="Lienhypertexte">upflow.io</text:span></text:a>)</text:p>
      <text:p text:style-name="Normal"><text:span text:style-name="T265">2. Très bonne expérience utilisateur et mise en œuvre rapide</text:span></text:p>
      <text:p text:style-name="Normal">Les avis Capterra mettent en avant l’ergonomie, la simplicité de paramétrage et la qualité du support. Au moment de la vérification, Upflow affichait une note de 4,5/5, quoique sur un échantillon limité de 15 avis. (<text:a office:title="Upflow Software Pricing, Alternatives &amp; More 2026" xlink:href="https://www.capterra.com/p/193097/Upflow/?utm_source=chatgpt.com" office:target-frame-name="_top" xlink:show="replace"><text:span text:style-name="Lienhypertexte">Capterra</text:span></text:a>)</text:p>
      <text:p text:style-name="Normal"><text:span text:style-name="T266">3. Résultats clients visibles</text:span></text:p>
      <text:p text:style-name="Normal">Upflow publie plusieurs cas montrant des réductions de DSO ou des économies de temps significatives : Malt annonce par exemple une baisse de DSO de 58 %, tandis que Feefo rapporte plus de 90 heures économisées par mois. Ces chiffres sont des études de cas sélectionnées par Upflow et non des benchmarks indépendants. (<text:a office:title="How Malt cut DSO by 58% while keeping up with hyper-growth" xlink:href="https://upflow.io/customers/malt?utm_source=chatgpt.com" office:target-frame-name="_top" xlink:show="replace"><text:span text:style-name="Lienhypertexte">upflow.io</text:span></text:a>)</text:p>
      <text:p text:style-name="P267">Faiblesses ou axes d’amélioration perçus</text:p>
      <text:p text:style-name="Normal"><text:span text:style-name="T268">1. Prix probablement trop élevé pour une grande partie des TPE</text:span></text:p>
      <text:p text:style-name="Normal">Avec un prix indicatif externe de 440 dollars par mois et un positionnement centré sur les équipes Finance B2B, Upflow est plus adapté aux scale-ups et PME structurées qu’aux indépendants ou petites TPE. (<text:a office:title="Upflow Software Pricing, Alternatives &amp; More 2026" xlink:href="https://www.capterra.com/p/193097/Upflow/?utm_source=chatgpt.com" office:target-frame-name="_top" xlink:show="replace"><text:span text:style-name="Lienhypertexte">Capterra</text:span></text:a>)</text:p>
      <text:p text:style-name="Normal"><text:span text:style-name="T269">2. Nécessité de conserver un autre logiciel</text:span></text:p>
      <text:p text:style-name="Normal">Upflow automatise le poste client, mais dépend d’un ERP, d’un logiciel comptable ou d’un système de billing externe pour récupérer les factures et les paiements. Une petite entreprise doit donc financer et maintenir au moins deux outils. (<text:a office:title="Accounts Receivable Automation Software for B2B Finance ..." xlink:href="https://upflow.io/accounts-receivable-automation-software?utm_source=chatgpt.com" office:target-frame-name="_top" xlink:show="replace"><text:span text:style-name="Lienhypertexte">upflow.io</text:span></text:a>)</text:p>
      <text:p text:style-name="Normal"><text:span text:style-name="T270">3. Limites d’intégration et de personnalisation signalées</text:span></text:p>
      <text:p text:style-name="Normal">Certains utilisateurs mentionnent des besoins supplémentaires concernant les champs personnalisés ERP, la traçabilité des réponses par email, les imports de paiement ou certaines fonctions demandées mais non développées. (<text:a office:title="Upflow Software Pricing, Alternatives &amp; More 2026" xlink:href="https://www.capterra.com/p/193097/Upflow/?utm_source=chatgpt.com" office:target-frame-name="_top" xlink:show="replace"><text:span text:style-name="Lienhypertexte">Capterra</text:span></text:a>)</text:p>
      <text:p text:style-name="Normal"><draw:custom-shape svg:x="0in" svg:y="0in" svg:width="45.51042in" svg:height="0.00139in" draw:id="id3" draw:style-name="a3" draw:name="Horizontal Line 40" text:anchor-type="as-char"><svg:title/><svg:desc/><draw:enhanced-geometry draw:type="non-primitive" svg:viewBox="0 0 21600 21600" draw:enhanced-path="M 0 0 L 21600 0 21600 21600 0 21600 Z N"/></draw:custom-shape></text:p>
      <text:p text:style-name="P271">4. Billabex</text:p>
      <text:p text:style-name="P272">Positionnement principal</text:p>
      <text:p text:style-name="Normal">Billabex se positionne comme un<text:s/><text:span text:style-name="T273">agent IA autonome de recouvrement</text:span><text:s/>destiné aux PME, aux équipes financières B2B, aux indépendants et aux cabinets comptables.</text:p>
      <text:p text:style-name="Normal">L’agent peut envoyer des relances, comprendre les réponses, adapter le ton, suivre les promesses de paiement et acheminer les dossiers nécessitant une intervention humaine. La plateforme annonce des communications dans plus de 80 langues et des intégrations avec Pennylane, Sage, NetSuite, Odoo, Sellsy et Chargebee. (<text:a office:title="Billabex - L'agent IA qui gère vos relances jusqu'au paiement" xlink:href="https://www.billabex.com/fr/?utm_source=chatgpt.com" office:target-frame-name="_top" xlink:show="replace"><text:span text:style-name="Lienhypertexte">Billabex</text:span></text:a>)</text:p>
      <text:soft-page-break/>
      <text:p text:style-name="P274">Prix publics</text:p>
      <text:p text:style-name="Normal">Les prix en euros ne sont pas publiés.</text:p>
      <text:p text:style-name="Normal">Billabex propose quatre paliers calculés selon le nombre de clients effectivement relancés :</text:p>
      <text:list text:style-name="LFO26" text:continue-numbering="true">
        <text:list-item>
          <text:p text:style-name="P275">Starter : jusqu’à 40 clients actifs ;</text:p>
        </text:list-item>
        <text:list-item>
          <text:p text:style-name="P276">Pro : jusqu’à 100 ;</text:p>
        </text:list-item>
        <text:list-item>
          <text:p text:style-name="P277">Business : jusqu’à 250 ;</text:p>
        </text:list-item>
        <text:list-item>
          <text:p text:style-name="P278">Enterprise : volume illimité.</text:p>
        </text:list-item>
      </text:list>
      <text:p text:style-name="Normal">Toutes les formules sont<text:s/><text:span text:style-name="T279">sur devis et sans engagement</text:span>. (<text:a office:title="&#10;      Tarifs Billabex - Logiciel de recouvrement IA&#10;    " xlink:href="https://www.billabex.com/fr/tarifs/" office:target-frame-name="_top" xlink:show="replace"><text:span text:style-name="Lienhypertexte">Billabex</text:span></text:a>)</text:p>
      <text:p text:style-name="P280">Forces les plus visibles</text:p>
      <text:p text:style-name="Normal"><text:span text:style-name="T281">1. Promesse très claire d’autonomie</text:span></text:p>
      <text:p text:style-name="Normal">Contrairement à un logiciel qui demande à l’utilisateur de construire et superviser tous ses workflows, Billabex promet de décider de la prochaine action, de comprendre les réponses et de suivre les engagements jusqu’au paiement. (<text:a office:title="Billabex - Pourquoi nous choisir ?" xlink:href="https://www.billabex.com/fr/pourquoi-billabex/?utm_source=chatgpt.com" office:target-frame-name="_top" xlink:show="replace"><text:span text:style-name="Lienhypertexte">Billabex</text:span></text:a>)</text:p>
      <text:p text:style-name="Normal"><text:span text:style-name="T282">2. Positionnement adapté aux PME sans credit manager</text:span></text:p>
      <text:p text:style-name="Normal">La solution vise les entreprises qui n’ont ni équipe de recouvrement dédiée ni ressources pour piloter quotidiennement leurs scénarios. La facturation par débiteur actif peut également être attractive pour les portefeuilles dont seule une partie nécessite des relances. (<text:a office:title="&#10;      Tarifs Billabex - Logiciel de recouvrement IA&#10;    " xlink:href="https://www.billabex.com/fr/tarifs/" office:target-frame-name="_top" xlink:show="replace"><text:span text:style-name="Lienhypertexte">Billabex</text:span></text:a>)</text:p>
      <text:p text:style-name="Normal"><text:span text:style-name="T283">3. Approche européenne et multicanale</text:span></text:p>
      <text:p text:style-name="Normal">Billabex annonce un hébergement des données dans l’Union européenne, une conformité RGPD et AI Act ainsi que des relances par email, SMS, téléphone et courrier. France Num référence également Billabex comme solution d’automatisation des relances. (<text:a office:title="&#10;      Tarifs Billabex - Logiciel de recouvrement IA&#10;    " xlink:href="https://www.billabex.com/fr/tarifs/" office:target-frame-name="_top" xlink:show="replace"><text:span text:style-name="Lienhypertexte">Billabex</text:span></text:a>)</text:p>
      <text:p text:style-name="P284">Faiblesses ou axes d’amélioration perçus</text:p>
      <text:p text:style-name="Normal"><text:span text:style-name="T285">1. Manque de transparence tarifaire</text:span></text:p>
      <text:p text:style-name="Normal">Les paliers sont publics, mais aucun montant ne permet à une TPE de déterminer immédiatement si la solution entre dans son budget. Cela crée davantage de friction commerciale que chez Pennylane ou Cegid Business. (<text:a office:title="&#10;      Tarifs Billabex - Logiciel de recouvrement IA&#10;    " xlink:href="https://www.billabex.com/fr/tarifs/" office:target-frame-name="_top" xlink:show="replace"><text:span text:style-name="Lienhypertexte">Billabex</text:span></text:a>)</text:p>
      <text:p text:style-name="Normal"><text:span text:style-name="T286">2. Peu de recul indépendant</text:span></text:p>
      <text:p text:style-name="Normal">Billabex est référencé sur G2, Capterra, Appvizer, France Num et AWS Marketplace, mais les retours publics détaillés restent nettement moins nombreux que pour Pennylane ou des éditeurs plus établis. Une grande partie des chiffres de réduction du DSO et de performance disponibles provient encore directement de Billabex. (<text:a office:title="billabex Reviews 2026: Details, Pricing, &amp; Features" xlink:href="https://www.g2.com/products/billabex/reviews?utm_source=chatgpt.com" office:target-frame-name="_top" xlink:show="replace"><text:span text:style-name="Lienhypertexte">G2</text:span></text:a>)</text:p>
      <text:p text:style-name="Normal"><text:span text:style-name="T287">3. Besoin de rassurer sur le contrôle humain</text:span></text:p>
      <text:p text:style-name="Normal">La promesse d’autonomie est différenciante, mais elle soulève des questions importantes pour les PME : validation des messages sensibles, gestion des erreurs, preuves des échanges, protection de la relation commerciale et conditions avant escalade juridique. Billabex indique que l’entreprise garde la maîtrise des accès et actions, mais ce contrôle doit être très visible dans le produit et les démonstrations. (<text:a office:title="Billabex - L'agent IA qui gère vos relances jusqu'au paiement" xlink:href="https://www.billabex.com/fr/?utm_source=chatgpt.com" office:target-frame-name="_top" xlink:show="replace"><text:span text:style-name="Lienhypertexte">Billabex</text:span></text:a>)</text:p>
      <text:soft-page-break/>
      <text:p text:style-name="Normal"><draw:custom-shape svg:x="0in" svg:y="0in" svg:width="45.51042in" svg:height="0.00139in" draw:id="id4" draw:style-name="a4" draw:name="Horizontal Line 41" text:anchor-type="as-char"><svg:title/><svg:desc/><draw:enhanced-geometry draw:type="non-primitive" svg:viewBox="0 0 21600 21600" draw:enhanced-path="M 0 0 L 21600 0 21600 21600 0 21600 Z N"/></draw:custom-shape></text:p>
      <text:p text:style-name="P288">Tableau comparatif</text:p>
      <table:table table:style-name="Table289">
        <table:table-columns>
          <table:table-column table:style-name="TableColumn290"/>
          <table:table-column table:style-name="TableColumn291"/>
          <table:table-column table:style-name="TableColumn292"/>
          <table:table-column table:style-name="TableColumn293"/>
          <table:table-column table:style-name="TableColumn294"/>
        </table:table-columns>
        <table:table-header-rows>
          <table:table-row table:style-name="TableRow295">
            <table:table-cell table:style-name="TableCell296">
              <text:p text:style-name="P297">Entreprise</text:p>
            </table:table-cell>
            <table:table-cell table:style-name="TableCell298">
              <text:p text:style-name="P299">Positionnement</text:p>
            </table:table-cell>
            <table:table-cell table:style-name="TableCell300">
              <text:p text:style-name="P301">Prix public indicatif</text:p>
            </table:table-cell>
            <table:table-cell table:style-name="TableCell302">
              <text:p text:style-name="P303">Forces principales</text:p>
            </table:table-cell>
            <table:table-cell table:style-name="TableCell304">
              <text:p text:style-name="P305">Limites principales</text:p>
            </table:table-cell>
          </table:table-row>
        </table:table-header-rows>
        <table:table-row table:style-name="TableRow306">
          <table:table-cell table:style-name="TableCell307">
            <text:p text:style-name="Normal"><text:span text:style-name="T308">Pennylane</text:span></text:p>
          </table:table-cell>
          <table:table-cell table:style-name="TableCell309">
            <text:p text:style-name="Normal">Gestion financière et comptabilité tout-en-un pour indépendants, TPE et PME</text:p>
          </table:table-cell>
          <table:table-cell table:style-name="TableCell310">
            <text:p text:style-name="Normal"><text:span text:style-name="T311">0 à 79 € HT/mois</text:span><text:s/>; relances automatiques dès 24 €</text:p>
          </table:table-cell>
          <table:table-cell table:style-name="TableCell312">
            <text:p text:style-name="Normal">Tout-en-un ; collaboration comptable ; prix accessible ; facturation électronique</text:p>
          </table:table-cell>
          <table:table-cell table:style-name="TableCell313">
            <text:p text:style-name="Normal">Recouvrement peu spécialisé ; limites multidevises ; dépendance aux intégrations (<text:a office:title="Tarifs | Pennylane" xlink:href="https://www.pennylane.com/fr/tarifs" office:target-frame-name="_top" xlink:show="replace"><text:span text:style-name="Lienhypertexte">Gestion Financière &amp; Comptabilité</text:span></text:a>)</text:p>
          </table:table-cell>
        </table:table-row>
        <table:table-row table:style-name="TableRow314">
          <table:table-cell table:style-name="TableCell315">
            <text:p text:style-name="Normal"><text:span text:style-name="T316">Cegid</text:span></text:p>
          </table:table-cell>
          <table:table-cell table:style-name="TableCell317">
            <text:p text:style-name="Normal">Suite historique de gestion, facturation, comptabilité et ERP</text:p>
          </table:table-cell>
          <table:table-cell table:style-name="TableCell318">
            <text:p text:style-name="Normal">Environ<text:s/><text:span text:style-name="T319">16,95 à 44,95 € HT/mois</text:span><text:s/>pour Cegid Business selon sources externes ; autres offres sur devis</text:p>
          </table:table-cell>
          <table:table-cell table:style-name="TableCell320">
            <text:p text:style-name="Normal">Profondeur fonctionnelle ; conformité ; écosystème comptable ; stocks et financement</text:p>
          </table:table-cell>
          <table:table-cell table:style-name="TableCell321">
            <text:p text:style-name="Normal">Complexité ; interface moins moderne ; tarification et gamme difficiles à lire ; recouvrement peu autonome (<text:a office:title="Notre avis sur Cegid - Analyse et Test Complet (MAJ 2026)" xlink:href="https://tool-advisor.fr/logiciel-comptabilite/comparatif/cegid/?utm_source=chatgpt.com" office:target-frame-name="_top" xlink:show="replace"><text:span text:style-name="Lienhypertexte">Tool Advisor</text:span></text:a>)</text:p>
          </table:table-cell>
        </table:table-row>
        <table:table-row table:style-name="TableRow322">
          <table:table-cell table:style-name="TableCell323">
            <text:p text:style-name="Normal"><text:span text:style-name="T324">Upflow</text:span></text:p>
          </table:table-cell>
          <table:table-cell table:style-name="TableCell325">
            <text:p text:style-name="Normal">Automatisation avancée du poste client pour équipes Finance B2B et scale-ups</text:p>
          </table:table-cell>
          <table:table-cell table:style-name="TableCell326">
            <text:p text:style-name="Normal">Officiel : sur devis ; Capterra : environ<text:s/><text:span text:style-name="T327">440 $/mois</text:span></text:p>
          </table:table-cell>
          <table:table-cell table:style-name="TableCell328">
            <text:p text:style-name="Normal">Spécialisation invoice-to-cash ; ergonomie ; intégrations ERP ; analytics avancés</text:p>
          </table:table-cell>
          <table:table-cell table:style-name="TableCell329">
            <text:p text:style-name="Normal">Cher pour les TPE ; nécessite un autre logiciel ; certaines limites d’intégration (<text:a office:title="Pricing | Upflow" xlink:href="https://upflow.io/pricing" office:target-frame-name="_top" xlink:show="replace"><text:span text:style-name="Lienhypertexte">upflow.io</text:span></text:a>)</text:p>
          </table:table-cell>
        </table:table-row>
        <table:table-row table:style-name="TableRow330">
          <table:table-cell table:style-name="TableCell331">
            <text:p text:style-name="Normal"><text:span text:style-name="T332">Billabex</text:span></text:p>
          </table:table-cell>
          <table:table-cell table:style-name="TableCell333">
            <text:p text:style-name="Normal">Agent IA autonome de recouvrement pour PME et équipes Finance B2B</text:p>
          </table:table-cell>
          <table:table-cell table:style-name="TableCell334">
            <text:p text:style-name="Normal"><text:span text:style-name="T335">Sur devis</text:span>, selon 40, 100, 250 ou plus de clients actifs</text:p>
          </table:table-cell>
          <table:table-cell table:style-name="TableCell336">
            <text:p text:style-name="Normal">Automatisation conversationnelle ; multicanal ; orientation PME ; données UE</text:p>
          </table:table-cell>
          <table:table-cell table:style-name="TableCell337">
            <text:p text:style-name="Normal">Prix opaque ; peu de validation indépendante ; nécessité de rassurer sur le contrôle humain (<text:a office:title="&#10;      Tarifs Billabex - Logiciel de recouvrement IA&#10;    " xlink:href="https://www.billabex.com/fr/tarifs/" office:target-frame-name="_top" xlink:show="replace"><text:span text:style-name="Lienhypertexte">Billabex</text:span></text:a>)</text:p>
          </table:table-cell>
        </table:table-row>
      </table:table>
      <text:p text:style-name="Normal"><draw:custom-shape svg:x="0in" svg:y="0in" svg:width="45.51042in" svg:height="0.00139in" draw:id="id5" draw:style-name="a5" draw:name="Horizontal Line 42" text:anchor-type="as-char"><svg:title/><svg:desc/><draw:enhanced-geometry draw:type="non-primitive" svg:viewBox="0 0 21600 21600" draw:enhanced-path="M 0 0 L 21600 0 21600 21600 0 21600 Z N"/></draw:custom-shape></text:p>
      <text:p text:style-name="P338">Positionnement recommandé</text:p>
      <text:p text:style-name="P339">Ne pas construire un nouveau logiciel de comptabilité</text:p>
      <text:p text:style-name="Normal">Affronter Pennylane ou Cegid sur la comptabilité complète serait coûteux et peu pertinent. Ces acteurs disposent déjà :</text:p>
      <text:list text:style-name="LFO27" text:continue-numbering="true">
        <text:list-item>
          <text:p text:style-name="P340">d’un important écosystème d’experts-comptables ;</text:p>
        </text:list-item>
        <text:list-item>
          <text:p text:style-name="P341">d’une Plateforme Agréée ;</text:p>
        </text:list-item>
        <text:list-item>
          <text:p text:style-name="P342">de nombreuses intégrations ;</text:p>
        </text:list-item>
        <text:list-item>
          <text:p text:style-name="P343">d’une forte profondeur réglementaire ;</text:p>
        </text:list-item>
        <text:list-item>
          <text:p text:style-name="P344">d’une base de clients difficile à déplacer.</text:p>
        </text:list-item>
      </text:list>
      <text:soft-page-break/>
      <text:p text:style-name="Normal">Le produit devrait donc<text:s/><text:span text:style-name="T345">se connecter à Pennylane, Cegid, Sage, Sellsy, Odoo, QuickBooks et Xero</text:span>, plutôt que chercher à les remplacer.</text:p>
      <text:p text:style-name="P346">Positionnement proposé</text:p>
      <text:p text:style-name="Normal"><text:span text:style-name="T347">Le copilote européen d’encaissement pour TPE et PME : de la facture au paiement, avec une IA supervisée.</text:span></text:p>
      <text:p text:style-name="Normal">Ce positionnement se placerait :</text:p>
      <text:list text:style-name="LFO28" text:continue-numbering="true">
        <text:list-item>
          <text:p text:style-name="P348">au-dessus des simples relances automatiques de Pennylane et Cegid ;</text:p>
        </text:list-item>
        <text:list-item>
          <text:p text:style-name="P349">en dessous de la complexité et du prix d’Upflow ;</text:p>
        </text:list-item>
        <text:list-item>
          <text:p text:style-name="P350">face à Billabex, mais avec davantage de transparence, de contrôle humain et de spécialisation métier.</text:p>
        </text:list-item>
      </text:list>
      <text:p text:style-name="P351">Différenciation à construire</text:p>
      <text:p text:style-name="P352">1. Une IA autonome, mais contrôlable</text:p>
      <text:p text:style-name="Normal">Trois modes devraient être proposés :</text:p>
      <text:list text:style-name="LFO29" text:continue-numbering="true">
        <text:list-item>
          <text:p text:style-name="P353"><text:span text:style-name="T354">Suggestion</text:span><text:s/>: l’IA prépare, l’utilisateur valide ;</text:p>
        </text:list-item>
        <text:list-item>
          <text:p text:style-name="P355"><text:span text:style-name="T356">Automatique encadré</text:span><text:s/>: l’IA agit dans des limites définies ;</text:p>
        </text:list-item>
        <text:list-item>
          <text:p text:style-name="P357"><text:span text:style-name="T358">Autonome</text:span><text:s/>: l’IA gère les dossiers standards et transmet les exceptions.</text:p>
        </text:list-item>
      </text:list>
      <text:p text:style-name="Normal">Cette approche rassurerait davantage les PME qu’une promesse exclusivement centrée sur le « zéro intervention humaine ».</text:p>
      <text:p text:style-name="P359">2. Un prix immédiatement compréhensible</text:p>
      <text:p text:style-name="Normal">Une tarification transparente représenterait un avantage majeur :</text:p>
      <text:list text:style-name="LFO30" text:continue-numbering="true">
        <text:list-item>
          <text:p text:style-name="P360">micro-entreprise ou freelance : moins de<text:s/><text:span text:style-name="T361">30 € HT/mois</text:span><text:s/>;</text:p>
        </text:list-item>
        <text:list-item>
          <text:p text:style-name="P362">TPE : environ<text:s/><text:span text:style-name="T363">49 à 79 € HT/mois</text:span><text:s/>;</text:p>
        </text:list-item>
        <text:list-item>
          <text:p text:style-name="P364">PME : environ<text:s/><text:span text:style-name="T365">129 à 199 € HT/mois</text:span><text:s/>;</text:p>
        </text:list-item>
        <text:list-item>
          <text:p text:style-name="P366">offre sur devis uniquement pour les grands volumes.</text:p>
        </text:list-item>
      </text:list>
      <text:p text:style-name="Normal">Le nombre de factures, de débiteurs actifs et de canaux inclus doit être clairement indiqué.</text:p>
      <text:p text:style-name="P367">3. Une spécialisation par métier</text:p>
      <text:p text:style-name="Normal">Plutôt qu’une solution générique, le produit pourrait proposer des agents préconfigurés pour :</text:p>
      <text:list text:style-name="LFO31" text:continue-numbering="true">
        <text:list-item>
          <text:p text:style-name="P368">cabinets de conseil et agences ;</text:p>
        </text:list-item>
        <text:list-item>
          <text:p text:style-name="P369">entreprises du BTP ;</text:p>
        </text:list-item>
        <text:list-item>
          <text:p text:style-name="P370">grossistes et importateurs ;</text:p>
        </text:list-item>
        <text:list-item>
          <text:p text:style-name="P371">organismes de formation ;</text:p>
        </text:list-item>
        <text:list-item>
          <text:p text:style-name="P372">sociétés de services et ESN ;</text:p>
        </text:list-item>
        <text:list-item>
          <text:p text:style-name="P373">cabinets comptables.</text:p>
        </text:list-item>
      </text:list>
      <text:soft-page-break/>
      <text:p text:style-name="Normal">Chaque secteur aurait ses modèles de relance, délais habituels, motifs de litige et règles d’escalade.</text:p>
      <text:p text:style-name="P374">4. La gestion des causes du retard, pas seulement des rappels</text:p>
      <text:p text:style-name="Normal">Le différenciateur le plus fort serait de comprendre pourquoi la facture n’est pas payée :</text:p>
      <text:list text:style-name="LFO32" text:continue-numbering="true">
        <text:list-item>
          <text:p text:style-name="P375">facture non reçue ;</text:p>
        </text:list-item>
        <text:list-item>
          <text:p text:style-name="P376">mauvais interlocuteur ;</text:p>
        </text:list-item>
        <text:list-item>
          <text:p text:style-name="P377">bon de commande manquant ;</text:p>
        </text:list-item>
        <text:list-item>
          <text:p text:style-name="P378">litige sur la prestation ;</text:p>
        </text:list-item>
        <text:list-item>
          <text:p text:style-name="P379">demande d’échéancier ;</text:p>
        </text:list-item>
        <text:list-item>
          <text:p text:style-name="P380">promesse de paiement ;</text:p>
        </text:list-item>
        <text:list-item>
          <text:p text:style-name="P381">validation interne bloquée ;</text:p>
        </text:list-item>
        <text:list-item>
          <text:p text:style-name="P382">coordonnées bancaires incorrectes.</text:p>
        </text:list-item>
      </text:list>
      <text:p text:style-name="Normal">L’IA devrait alors ouvrir une tâche, demander le document manquant, prévenir la bonne personne ou proposer un échéancier.</text:p>
      <text:p text:style-name="P383">5. Une promesse mesurable</text:p>
      <text:p text:style-name="Normal">Le marketing ne devrait pas vendre uniquement « l’IA », mais trois résultats :</text:p>
      <text:p text:style-name="Normal"><text:span text:style-name="T384">Réduisez votre DSO. Récupérez votre temps. Préservez votre relation client.</text:span></text:p>
      <text:p text:style-name="Normal">Le tableau de bord devrait mesurer :</text:p>
      <text:list text:style-name="LFO33" text:continue-numbering="true">
        <text:list-item>
          <text:p text:style-name="P385">montant récupéré ;</text:p>
        </text:list-item>
        <text:list-item>
          <text:p text:style-name="P386">DSO avant/après ;</text:p>
        </text:list-item>
        <text:list-item>
          <text:p text:style-name="P387">heures économisées ;</text:p>
        </text:list-item>
        <text:list-item>
          <text:p text:style-name="P388">taux de promesses respectées ;</text:p>
        </text:list-item>
        <text:list-item>
          <text:p text:style-name="P389">litiges résolus ;</text:p>
        </text:list-item>
        <text:list-item>
          <text:p text:style-name="P390">factures à risque ;</text:p>
        </text:list-item>
        <text:list-item>
          <text:p text:style-name="P391">efficacité de chaque canal et scénario.</text:p>
        </text:list-item>
      </text:list>
      <text:p text:style-name="P392">Recommandation finale</text:p>
      <text:p text:style-name="Normal">Le positionnement le plus judicieux est celui d’une<text:s/><text:span text:style-name="T393">solution invoice-to-cash légère, européenne, multilingue et transparente</text:span>, qui fonctionne avec les logiciels de facturation déjà utilisés par les TPE et PME.</text:p>
      <text:p text:style-name="Normal">Il ne faut être :</text:p>
      <text:list text:style-name="LFO34" text:continue-numbering="true">
        <text:list-item>
          <text:p text:style-name="P394">ni une nouvelle suite comptable généraliste comme Pennylane ou Cegid ;</text:p>
        </text:list-item>
        <text:list-item>
          <text:p text:style-name="P395">ni une plateforme coûteuse pour grandes équipes Finance comme Upflow ;</text:p>
        </text:list-item>
        <text:list-item>
          <text:p text:style-name="P396">ni seulement un agent de relance autonome comme Billabex.</text:p>
        </text:list-item>
      </text:list>
      <text:soft-page-break/>
      <text:p text:style-name="Normal">La meilleure proposition serait :</text:p>
      <text:p text:style-name="Normal"><text:span text:style-name="T397">Une plateforme qui détecte les retards, dialogue avec le client, résout les blocages, facilite le paiement et transmet à l’humain uniquement les dossiers qui exigent une décisio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ylvie NITIEMA</meta:initial-creator>
    <dc:creator>Sylvie NITIEMA</dc:creator>
    <meta:creation-date>2026-07-19T06:07:00Z</meta:creation-date>
    <dc:date>2026-07-19T06:07:00Z</dc:date>
    <meta:template xlink:href="Normal" xlink:type="simple"/>
    <meta:editing-cycles>2</meta:editing-cycles>
    <meta:editing-duration>PT60S</meta:editing-duration>
    <meta:document-statistic meta:page-count="16" meta:paragraph-count="78" meta:word-count="6067" meta:character-count="39362" meta:row-count="278" meta:non-whitespace-character-count="33373"/>
  </office:meta>
</office:document-meta>
</file>